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12.347cm"/>
    </style:style>
    <style:style style:name="co3" style:family="table-column">
      <style:table-column-properties fo:break-before="auto" style:column-width="5.927cm"/>
    </style:style>
    <style:style style:name="co4" style:family="table-column">
      <style:table-column-properties fo:break-before="auto" style:column-width="5.962cm"/>
    </style:style>
    <style:style style:name="co5" style:family="table-column">
      <style:table-column-properties fo:break-before="auto" style:column-width="7.1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6.75cm"/>
    </style:style>
    <style:style style:name="co9" style:family="table-column">
      <style:table-column-properties fo:break-before="auto" style:column-width="14.429cm"/>
    </style:style>
    <style:style style:name="co10" style:family="table-column">
      <style:table-column-properties fo:break-before="auto" style:column-width="4.692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4.203cm"/>
    </style:style>
    <style:style style:name="co13" style:family="table-column">
      <style:table-column-properties fo:break-before="auto" style:column-width="6.59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0.125cm"/>
    </style:style>
    <style:style style:name="co16" style:family="table-column">
      <style:table-column-properties fo:break-before="auto" style:column-width="11.853cm"/>
    </style:style>
    <style:style style:name="co17" style:family="table-column">
      <style:table-column-properties fo:break-before="auto" style:column-width="2.999cm"/>
    </style:style>
    <style:style style:name="co18" style:family="table-column">
      <style:table-column-properties fo:break-before="auto" style:column-width="3.422cm"/>
    </style:style>
    <style:style style:name="co19" style:family="table-column">
      <style:table-column-properties fo:break-before="auto" style:column-width="3.457cm"/>
    </style:style>
    <style:style style:name="co20" style:family="table-column">
      <style:table-column-properties fo:break-before="auto" style:column-width="3.916cm"/>
    </style:style>
    <style:style style:name="co21" style:family="table-column">
      <style:table-column-properties fo:break-before="auto" style:column-width="4.198cm"/>
    </style:style>
    <style:style style:name="co22" style:family="table-column">
      <style:table-column-properties fo:break-before="auto" style:column-width="2.644cm"/>
    </style:style>
    <style:style style:name="co23" style:family="table-column">
      <style:table-column-properties fo:break-before="auto" style:column-width="2.822cm"/>
    </style:style>
    <style:style style:name="co24" style:family="table-column">
      <style:table-column-properties fo:break-before="auto" style:column-width="1.588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1.834cm"/>
    </style:style>
    <style:style style:name="co27" style:family="table-column">
      <style:table-column-properties fo:break-before="auto" style:column-width="2.223cm"/>
    </style:style>
    <style:style style:name="co28" style:family="table-column">
      <style:table-column-properties fo:break-before="auto" style:column-width="3.951cm"/>
    </style:style>
    <style:style style:name="co29" style:family="table-column">
      <style:table-column-properties fo:break-before="auto" style:column-width="0.882cm"/>
    </style:style>
    <style:style style:name="co30" style:family="table-column">
      <style:table-column-properties fo:break-before="auto" style:column-width="2.542cm"/>
    </style:style>
    <style:style style:name="co31" style:family="table-column">
      <style:table-column-properties fo:break-before="auto" style:column-width="10.478cm"/>
    </style:style>
    <style:style style:name="co32" style:family="table-column">
      <style:table-column-properties fo:break-before="auto" style:column-width="3.669cm"/>
    </style:style>
    <style:style style:name="co33" style:family="table-column">
      <style:table-column-properties fo:break-before="auto" style:column-width="3.175cm"/>
    </style:style>
    <style:style style:name="co34" style:family="table-column">
      <style:table-column-properties fo:break-before="auto" style:column-width="4.41cm"/>
    </style:style>
    <style:style style:name="co35" style:family="table-column">
      <style:table-column-properties fo:break-before="auto" style:column-width="4.551cm"/>
    </style:style>
    <style:style style:name="co36" style:family="table-column">
      <style:table-column-properties fo:break-before="auto" style:column-width="3.104cm"/>
    </style:style>
    <style:style style:name="co37" style:family="table-column">
      <style:table-column-properties fo:break-before="auto" style:column-width="1.764cm"/>
    </style:style>
    <style:style style:name="co38" style:family="table-column">
      <style:table-column-properties fo:break-before="auto" style:column-width="1.693cm"/>
    </style:style>
    <style:style style:name="co39" style:family="table-column">
      <style:table-column-properties fo:break-before="auto" style:column-width="2.187cm"/>
    </style:style>
    <style:style style:name="co40" style:family="table-column">
      <style:table-column-properties fo:break-before="auto" style:column-width="3.03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Resumo_5f_Executivo">
      <style:table-properties table:display="true" style:writing-mode="lr-tb"/>
    </style:style>
    <style:style style:name="ta2" style:family="table" style:master-page-name="PageStyle_5f_Cadastro_5f_Impressoras">
      <style:table-properties table:display="true" style:writing-mode="lr-tb"/>
    </style:style>
    <style:style style:name="ta3" style:family="table" style:master-page-name="PageStyle_5f_Leituras_5f_Contadores">
      <style:table-properties table:display="true" style:writing-mode="lr-tb"/>
    </style:style>
    <style:style style:name="ta4" style:family="table" style:master-page-name="PageStyle_5f_Volume_5f_Impressao">
      <style:table-properties table:display="true" style:writing-mode="lr-tb"/>
    </style:style>
    <style:style style:name="ta5" style:family="table" style:master-page-name="PageStyle_5f_Custos_5f_Mensai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b365d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d3d3d3" fo:background-color="#f9fafb" style:diagonal-bl-tr="none" style:diagonal-tl-br="none" style:text-align-source="fix" style:repeat-content="false" fo:wrap-option="no-wrap" fo:border-left="0.74pt solid #d3d3d3" style:direction="ltr" fo:border-right="none" style:rotation-angle="0" style:rotation-align="none" style:shrink-to-fit="false" fo:border-top="0.74pt solid #d3d3d3" style:vertical-align="middle" loext:vertical-justify="auto"/>
      <style:paragraph-properties fo:text-align="start" css3t:text-justify="auto" fo:margin-left="0cm" style:writing-mode="page"/>
      <style:text-properties fo:color="#555555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3">
      <style:table-cell-properties fo:border-bottom="0.74pt solid #d3d3d3" fo:background-color="#f9fafb" style:diagonal-bl-tr="none" style:diagonal-tl-br="none" style:text-align-source="fix" style:repeat-content="false" fo:wrap-option="no-wrap" fo:border-left="0.74pt solid #d3d3d3" style:direction="ltr" fo:border-right="none" style:rotation-angle="0" style:rotation-align="none" style:shrink-to-fit="false" fo:border-top="0.74pt solid #d3d3d3" style:vertical-align="middle" loext:vertical-justify="auto"/>
      <style:paragraph-properties fo:text-align="start" css3t:text-justify="auto" fo:margin-left="0cm" style:writing-mode="page"/>
      <style:text-properties fo:color="#1b365d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b365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1b365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double-thin #1b365d" style:border-line-width-bottom="0.018cm 0.026cm 0.018cm" fo:background-color="#e6ed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1b365d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53">
      <style:table-cell-properties fo:border-bottom="0.74pt solid #d3d3d3" fo:background-color="#f9fafb" style:diagonal-bl-tr="none" style:diagonal-tl-br="none" style:text-align-source="fix" style:repeat-content="false" fo:wrap-option="no-wrap" fo:border-left="0.74pt solid #d3d3d3" style:direction="ltr" fo:border-right="none" style:rotation-angle="0" style:rotation-align="none" style:shrink-to-fit="false" fo:border-top="0.74pt solid #d3d3d3" style:vertical-align="middle" loext:vertical-justify="auto"/>
      <style:paragraph-properties fo:text-align="start" css3t:text-justify="auto" fo:margin-left="0cm" style:writing-mode="page"/>
      <style:text-properties fo:color="#1b365d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1b365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d3d3d3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3">
      <style:table-cell-properties fo:background-color="#f2f4f8" style:diagonal-bl-tr="none" style:diagonal-tl-br="none" style:text-align-source="fix" style:repeat-content="false" fo:wrap-option="no-wrap" fo:border="0.74pt solid #d3d3d3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3">
      <style:table-cell-properties fo:border-bottom="1.76pt double-thin #1b365d" style:border-line-width-bottom="0.018cm 0.026cm 0.018cm" fo:background-color="#e6ed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1b365d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d3d3d3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53">
      <style:table-cell-properties fo:background-color="#f2f4f8" style:diagonal-bl-tr="none" style:diagonal-tl-br="none" style:text-align-source="fix" style:repeat-content="false" fo:wrap-option="no-wrap" fo:border="0.74pt solid #d3d3d3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53">
      <style:table-cell-properties fo:border-bottom="1.76pt double-thin #1b365d" style:border-line-width-bottom="0.018cm 0.026cm 0.018cm" fo:background-color="#e6ed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1b365d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d3d3d3" fo:background-color="#f9fafb" style:diagonal-bl-tr="none" style:diagonal-tl-br="none" style:text-align-source="fix" style:repeat-content="false" fo:wrap-option="no-wrap" fo:border-left="none" style:direction="ltr" fo:border-right="0.74pt solid #d3d3d3" style:rotation-angle="0" style:rotation-align="none" style:shrink-to-fit="false" fo:border-top="0.74pt solid #d3d3d3" style:vertical-align="middle" loext:vertical-justify="auto"/>
      <style:paragraph-properties fo:text-align="center" css3t:text-justify="auto" fo:margin-left="0cm" style:writing-mode="page"/>
      <style:text-properties fo:color="#555555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53">
      <style:table-cell-properties fo:border-bottom="0.74pt solid #d3d3d3" fo:background-color="#f9fafb" style:diagonal-bl-tr="none" style:diagonal-tl-br="none" style:text-align-source="fix" style:repeat-content="false" fo:wrap-option="no-wrap" fo:border-left="none" style:direction="ltr" fo:border-right="0.74pt solid #d3d3d3" style:rotation-angle="0" style:rotation-align="none" style:shrink-to-fit="false" fo:border-top="0.74pt solid #d3d3d3" style:vertical-align="middle" loext:vertical-justify="auto"/>
      <style:paragraph-properties fo:text-align="center" css3t:text-justify="auto" fo:margin-left="0cm" style:writing-mode="page"/>
      <style:text-properties fo:color="#1b365d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f2f4f8"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153">
      <style:table-cell-properties fo:background-color="#f2f4f8"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153">
      <style:table-cell-properties fo:background-color="#f2f4f8"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2f4f8"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4">
      <style:table-cell-properties fo:background-color="#f2f4f8"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3">
      <style:table-cell-properties fo:background-color="#f2f4f8"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d3d3d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double-thin #1b365d" style:border-line-width-bottom="0.018cm 0.026cm 0.018cm" fo:background-color="#e6edf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b365d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d3d3d3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3">
      <style:table-cell-properties fo:background-color="#f2f4f8" style:diagonal-bl-tr="none" style:diagonal-tl-br="none" style:text-align-source="fix" style:repeat-content="false" fo:wrap-option="no-wrap" fo:border="0.74pt solid #d3d3d3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d3d3d3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153">
      <style:table-cell-properties fo:background-color="#f2f4f8" style:diagonal-bl-tr="none" style:diagonal-tl-br="none" style:text-align-source="fix" style:repeat-content="false" fo:wrap-option="no-wrap" fo:border="0.74pt solid #d3d3d3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wrap-option="no-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o_Executiv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0" table:default-cell-style-name="Default"/>
        <table:table-column table:style-name="co7" table:number-columns-repeated="16358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DASHBOARD ESTRATÉGICO DE IMPRESSÕES - 2026</text:p>
          </table:table-cell>
          <table:table-cell table:number-columns-repeated="2"/>
          <table:table-cell>
            <draw:frame draw:z-index="0" draw:name="Chart 1" draw:style-name="gr1" draw:text-style-name="P1" svg:width="24.103cm" svg:height="24.976cm" svg:x="0.185cm" svg:y="0.026cm">
              <draw:object draw:notify-on-update-of-ranges="Resumo_Executivo.B9:Resumo_Executivo.B21 Resumo_Executivo.D9:Resumo_Executivo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Gráfico</svg:title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" office:value-type="string" calcext:value-type="string">
            <text:p>VOLUME TOTAL ACUMULADO (PÁG.)</text:p>
          </table:table-cell>
          <table:table-cell table:style-name="ce2" office:value-type="string" calcext:value-type="string">
            <text:p>CUSTO TOTAL ACUMULADO (R$)</text:p>
          </table:table-cell>
          <table:table-cell table:number-columns-repeated="2"/>
          <table:table-cell table:style-name="ce17"/>
          <table:table-cell table:number-columns-repeated="16378"/>
        </table:table-row>
        <table:table-row table:style-name="ro4">
          <table:table-cell/>
          <table:table-cell table:style-name="ce3" table:formula="of:=[$Volume_Impressao.P18]" office:value-type="float" office:value="110420" calcext:value-type="float">
            <text:p>110.420</text:p>
          </table:table-cell>
          <table:table-cell table:style-name="ce9" table:formula="of:=[$Custos_Mensais.P18]" office:value-type="string" office:string-value="" calcext:value-type="error">
            <text:p>#REF!</text:p>
          </table:table-cell>
          <table:table-cell table:number-columns-repeated="2"/>
          <table:table-cell table:style-name="ce18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4" office:value-type="string" calcext:value-type="string">
            <text:p>Resumo por Equipamento</text:p>
          </table:table-cell>
          <table:table-cell table:number-columns-repeated="16382"/>
        </table:table-row>
        <table:table-row table:style-name="ro5">
          <table:table-cell/>
          <table:table-cell table:style-name="ce5" office:value-type="string" calcext:value-type="string">
            <text:p>Equipamento</text:p>
          </table:table-cell>
          <table:table-cell table:style-name="ce10" office:value-type="string" calcext:value-type="string">
            <text:p>Volume Total (Pág.)</text:p>
          </table:table-cell>
          <table:table-cell table:style-name="ce10" office:value-type="string" calcext:value-type="string">
            <text:p>Custo Total (R$)</text:p>
          </table:table-cell>
          <table:table-cell table:number-columns-repeated="16380"/>
        </table:table-row>
        <table:table-row table:style-name="ro5">
          <table:table-cell/>
          <table:table-cell table:style-name="ce6" table:formula="of:=[#REF!]" office:value-type="string" office:string-value="" calcext:value-type="error">
            <text:p>#REF!</text:p>
          </table:table-cell>
          <table:table-cell table:style-name="ce11" table:formula="of:=[$Volume_Impressao.P5]" office:value-type="float" office:value="25003" calcext:value-type="float">
            <text:p>25.003</text:p>
          </table:table-cell>
          <table:table-cell table:style-name="ce14" table:formula="of:=[$Custos_Mensais.P5]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5">
          <table:table-cell/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[$Volume_Impressao.P6]" office:value-type="float" office:value="24194" calcext:value-type="float">
            <text:p>24.194</text:p>
          </table:table-cell>
          <table:table-cell table:style-name="ce15" table:formula="of:=[$Custos_Mensais.P6]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5">
          <table:table-cell/>
          <table:table-cell table:style-name="ce7" table:formula="of:=[#REF!]" office:value-type="string" office:string-value="" calcext:value-type="error">
            <text:p>#REF!</text:p>
          </table:table-cell>
          <table:table-cell table:style-name="ce11" table:formula="of:=[$Volume_Impressao.P7]" office:value-type="float" office:value="628" calcext:value-type="float">
            <text:p>628</text:p>
          </table:table-cell>
          <table:table-cell table:style-name="ce14" table:formula="of:=[$Custos_Mensais.P7]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5">
          <table:table-cell/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[$Volume_Impressao.P8]" office:value-type="float" office:value="18700" calcext:value-type="float">
            <text:p>18.700</text:p>
          </table:table-cell>
          <table:table-cell table:style-name="ce15" table:formula="of:=[$Custos_Mensais.P8]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5">
          <table:table-cell/>
          <table:table-cell table:style-name="ce6" table:formula="of:=[#REF!]" office:value-type="string" office:string-value="" calcext:value-type="error">
            <text:p>#REF!</text:p>
          </table:table-cell>
          <table:table-cell table:style-name="ce11" table:formula="of:=[$Volume_Impressao.P9]" office:value-type="float" office:value="1054" calcext:value-type="float">
            <text:p>1.054</text:p>
          </table:table-cell>
          <table:table-cell table:style-name="ce14" table:formula="of:=[$Custos_Mensais.P9]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5">
          <table:table-cell/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[$Volume_Impressao.P10]" office:value-type="float" office:value="12778" calcext:value-type="float">
            <text:p>12.778</text:p>
          </table:table-cell>
          <table:table-cell table:style-name="ce15" table:formula="of:=[$Custos_Mensais.P10]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5">
          <table:table-cell/>
          <table:table-cell table:style-name="ce7" table:formula="of:=[#REF!]" office:value-type="string" office:string-value="" calcext:value-type="error">
            <text:p>#REF!</text:p>
          </table:table-cell>
          <table:table-cell table:style-name="ce11" table:formula="of:=[$Volume_Impressao.P11]" office:value-type="float" office:value="5127" calcext:value-type="float">
            <text:p>5.127</text:p>
          </table:table-cell>
          <table:table-cell table:style-name="ce14" table:formula="of:=[$Custos_Mensais.P11]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5">
          <table:table-cell/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[$Volume_Impressao.P12]" office:value-type="float" office:value="576" calcext:value-type="float">
            <text:p>576</text:p>
          </table:table-cell>
          <table:table-cell table:style-name="ce15" table:formula="of:=[$Custos_Mensais.P12]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5">
          <table:table-cell/>
          <table:table-cell table:style-name="ce6" table:formula="of:=[#REF!]" office:value-type="string" office:string-value="" calcext:value-type="error">
            <text:p>#REF!</text:p>
          </table:table-cell>
          <table:table-cell table:style-name="ce11" table:formula="of:=[$Volume_Impressao.P13]" office:value-type="float" office:value="3081" calcext:value-type="float">
            <text:p>3.081</text:p>
          </table:table-cell>
          <table:table-cell table:style-name="ce14" table:formula="of:=[$Custos_Mensais.P13]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5">
          <table:table-cell/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[$Volume_Impressao.P14]" office:value-type="float" office:value="18816" calcext:value-type="float">
            <text:p>18.816</text:p>
          </table:table-cell>
          <table:table-cell table:style-name="ce15" table:formula="of:=[$Custos_Mensais.P14]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5">
          <table:table-cell/>
          <table:table-cell table:style-name="ce6" table:formula="of:=[#REF!]" office:value-type="string" office:string-value="" calcext:value-type="error">
            <text:p>#REF!</text:p>
          </table:table-cell>
          <table:table-cell table:style-name="ce11" table:formula="of:=[$Volume_Impressao.P15]" office:value-type="float" office:value="463" calcext:value-type="float">
            <text:p>463</text:p>
          </table:table-cell>
          <table:table-cell table:style-name="ce14" table:formula="of:=[$Custos_Mensais.P15]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5">
          <table:table-cell/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[$Volume_Impressao.P16]" office:value-type="float" office:value="0" calcext:value-type="float">
            <text:p>0</text:p>
          </table:table-cell>
          <table:table-cell table:style-name="ce15" table:formula="of:=[$Custos_Mensais.P16]" office:value-type="float" office:value="0" calcext:value-type="float">
            <text:p>R$ 0,00</text:p>
          </table:table-cell>
          <table:table-cell table:number-columns-repeated="16380"/>
        </table:table-row>
        <table:table-row table:style-name="ro6">
          <table:table-cell/>
          <table:table-cell table:style-name="ce6" table:formula="of:=[#REF!]" office:value-type="string" office:string-value="" calcext:value-type="error">
            <text:p>#REF!</text:p>
          </table:table-cell>
          <table:table-cell table:style-name="ce11" table:formula="of:=[$Volume_Impressao.P17]" office:value-type="float" office:value="0" calcext:value-type="float">
            <text:p>0</text:p>
          </table:table-cell>
          <table:table-cell table:style-name="ce14" table:formula="of:=[$Custos_Mensais.P17]" office:value-type="float" office:value="0" calcext:value-type="float">
            <text:p>R$ 0,00</text:p>
          </table:table-cell>
          <table:table-cell table:number-columns-repeated="16380"/>
        </table:table-row>
        <table:table-row table:style-name="ro6">
          <table:table-cell/>
          <table:table-cell table:style-name="ce8" office:value-type="string" calcext:value-type="string">
            <text:p>Total Geral</text:p>
          </table:table-cell>
          <table:table-cell table:style-name="ce13" table:formula="of:=SUM([.C9:.C21])" office:value-type="float" office:value="110420" calcext:value-type="float">
            <text:p>110.420</text:p>
          </table:table-cell>
          <table:table-cell table:style-name="ce16" table:formula="of:=SUM([.D9:.D21])" office:value-type="string" office:string-value="" calcext:value-type="error">
            <text:p>#REF!</text:p>
          </table:table-cell>
          <table:table-cell table:number-columns-repeated="16380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Planilha atualizada em 09/05/2026</text:p>
          </table:table-cell>
          <table:table-cell table:number-columns-repeated="16382"/>
        </table:table-row>
        <table:table-row table:style-name="ro6" table:number-rows-repeated="974">
          <table:table-cell table:number-columns-repeated="16384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dastro_Impressoras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3" table:default-cell-style-name="Default"/>
        <table:table-column table:style-name="co7" table:number-columns-repeated="16358" table:default-cell-style-name="Default"/>
        <table:table-row table:style-name="ro6">
          <table:table-cell/>
          <table:table-cell table:style-name="ce10" office:value-type="string" calcext:value-type="string">
            <text:p>ID</text:p>
          </table:table-cell>
          <table:table-cell table:style-name="ce5" office:value-type="string" calcext:value-type="string">
            <text:p>Equipamento / Localização / Série</text:p>
          </table:table-cell>
          <table:table-cell table:style-name="ce10" office:value-type="string" calcext:value-type="string">
            <text:p>Custo por Página</text:p>
          </table:table-cell>
          <table:table-cell table:style-name="ce10" office:value-type="string" calcext:value-type="string">
            <text:p>Franquia Mensal</text:p>
          </table:table-cell>
          <table:table-cell table:style-name="ce10" office:value-type="string" calcext:value-type="string">
            <text:p>Ativo</text:p>
          </table:table-cell>
          <table:table-cell table:style-name="ce10" office:value-type="string" calcext:value-type="string">
            <text:p>IP</text:p>
          </table:table-cell>
          <table:table-cell table:style-name="ce10" office:value-type="string" calcext:value-type="string">
            <text:p>Comunidade</text:p>
          </table:table-cell>
          <table:table-cell table:style-name="ce10" office:value-type="string" calcext:value-type="string">
            <text:p>Versão</text:p>
          </table:table-cell>
          <table:table-cell table:style-name="ce10" office:value-type="string" calcext:value-type="string">
            <text:p>OID cotador pag</text:p>
          </table:table-cell>
          <table:table-cell table:style-name="ce10" office:value-type="string" calcext:value-type="string">
            <text:p>OID toner</text:p>
          </table:table-cell>
          <table:table-cell table:style-name="ce10" office:value-type="string" calcext:value-type="string">
            <text:p>OBS</text:p>
          </table:table-cell>
          <table:table-cell table:style-name="ce10" office:value-type="string" calcext:value-type="string">
            <text:p>Ativo</text:p>
          </table:table-cell>
          <table:table-cell table:number-columns-repeated="16365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exmark (B1) - TB</text:p>
          </table:table-cell>
          <table:table-cell table:style-name="ce54" office:value-type="float" office:value="0.096" calcext:value-type="float">
            <text:p>R$ 0,10</text:p>
          </table:table-cell>
          <table:table-cell table:style-name="ce54" office:value-type="float" office:value="0" calcext:value-type="float">
            <text:p>R$ 0,00</text:p>
          </table:table-cell>
          <table:table-cell office:value-type="string" calcext:value-type="string">
            <text:p>sim</text:p>
          </table:table-cell>
          <table:table-cell table:style-name="ce58" office:value-type="string" calcext:value-type="string">
            <text:p>192.168.1.1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2c</text:p>
          </table:table-cell>
          <table:table-cell table:style-name="ce58" office:value-type="string" calcext:value-type="string">
            <text:p>1.3.6.1.2.1.43.10.2.1.4.1.1</text:p>
          </table:table-cell>
          <table:table-cell table:style-name="ce58" office:value-type="string" calcext:value-type="string">
            <text:p>1.3.6.1.2.1.43.16.5.1.2.1</text:p>
          </table:table-cell>
          <table:table-cell table:number-columns-repeated="16367"/>
        </table:table-row>
        <table:table-row table:style-name="ro6">
          <table:table-cell/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Brother (B1 - Primeira a esquerda) - 51</text:p>
          </table:table-cell>
          <table:table-cell table:style-name="ce55" office:value-type="float" office:value="0.19" calcext:value-type="float">
            <text:p>R$ 0,19</text:p>
          </table:table-cell>
          <table:table-cell table:style-name="ce55" office:value-type="float" office:value="0" calcext:value-type="float">
            <text:p>R$ 0,00</text:p>
          </table:table-cell>
          <table:table-cell office:value-type="string" calcext:value-type="string">
            <text:p>sim</text:p>
          </table:table-cell>
          <table:table-cell table:style-name="ce58" office:value-type="string" calcext:value-type="string">
            <text:p>192.168.1.11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3c</text:p>
          </table:table-cell>
          <table:table-cell table:style-name="ce58" office:value-type="string" calcext:value-type="string">
            <text:p>1.3.6.1.2.1.43.10.2.1.4.1.2</text:p>
          </table:table-cell>
          <table:table-cell table:style-name="ce58" office:value-type="string" calcext:value-type="string">
            <text:p>1.3.6.1.2.1.43.16.5.1.2.2</text:p>
          </table:table-cell>
          <table:table-cell table:number-columns-repeated="16367"/>
        </table:table-row>
        <table:table-row table:style-name="ro6"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rother (B1 - Lado da Lexmark) - 04 / Canon - 64</text:p>
          </table:table-cell>
          <table:table-cell table:style-name="ce54" office:value-type="float" office:value="0.19" calcext:value-type="float">
            <text:p>R$ 0,19</text:p>
          </table:table-cell>
          <table:table-cell table:style-name="ce54" office:value-type="float" office:value="0" calcext:value-type="float">
            <text:p>R$ 0,00</text:p>
          </table:table-cell>
          <table:table-cell office:value-type="string" calcext:value-type="string">
            <text:p>sim</text:p>
          </table:table-cell>
          <table:table-cell table:style-name="ce58" office:value-type="string" calcext:value-type="string">
            <text:p>192.168.1.12</text:p>
          </table:table-cell>
          <table:table-cell table:style-name="ce58" office:value-type="string" calcext:value-type="string">
            <text:p>private</text:p>
          </table:table-cell>
          <table:table-cell office:value-type="string" calcext:value-type="string">
            <text:p>4c</text:p>
          </table:table-cell>
          <table:table-cell table:style-name="ce58" office:value-type="string" calcext:value-type="string">
            <text:p>1.3.6.1.2.1.43.10.2.1.4.1.3</text:p>
          </table:table-cell>
          <table:table-cell table:style-name="ce58" office:value-type="string" calcext:value-type="string">
            <text:p>1.3.6.1.2.1.43.16.5.1.2.3</text:p>
          </table:table-cell>
          <table:table-cell table:style-name="ce58" office:value-type="string" calcext:value-type="string">
            <text:p>comunidade diferente</text:p>
          </table:table-cell>
          <table:table-cell table:style-name="ce59" office:value-type="string" calcext:value-type="string">
            <text:p>Substituida em 02/02 numerador 147768</text:p>
          </table:table-cell>
          <table:table-cell table:number-columns-repeated="16365"/>
        </table:table-row>
        <table:table-row table:style-name="ro6">
          <table:table-cell/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Toshiba (B1)</text:p>
          </table:table-cell>
          <table:table-cell table:style-name="ce55" office:value-type="float" office:value="0.096" calcext:value-type="float">
            <text:p>R$ 0,10</text:p>
          </table:table-cell>
          <table:table-cell table:style-name="ce55" office:value-type="float" office:value="0" calcext:value-type="float">
            <text:p>R$ 0,00</text:p>
          </table:table-cell>
          <table:table-cell office:value-type="string" calcext:value-type="string">
            <text:p>sim</text:p>
          </table:table-cell>
          <table:table-cell table:style-name="ce58" office:value-type="string" calcext:value-type="string">
            <text:p>192.168.1.13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5c</text:p>
          </table:table-cell>
          <table:table-cell table:style-name="ce58" office:value-type="string" calcext:value-type="string">
            <text:p>1.3.6.1.2.1.43.10.2.1.4.1.4</text:p>
          </table:table-cell>
          <table:table-cell table:style-name="ce58" office:value-type="string" calcext:value-type="string">
            <text:p>1.3.6.1.2.1.43.16.5.1.2.4</text:p>
          </table:table-cell>
          <table:table-cell table:number-columns-repeated="16367"/>
        </table:table-row>
        <table:table-row table:style-name="ro6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annon (Secretaria) - 73</text:p>
          </table:table-cell>
          <table:table-cell table:style-name="ce54" office:value-type="float" office:value="0.19" calcext:value-type="float">
            <text:p>R$ 0,19</text:p>
          </table:table-cell>
          <table:table-cell table:style-name="ce55" office:value-type="float" office:value="0" calcext:value-type="float">
            <text:p>R$ 0,00</text:p>
          </table:table-cell>
          <table:table-cell office:value-type="string" calcext:value-type="string">
            <text:p>sim</text:p>
          </table:table-cell>
          <table:table-cell table:style-name="ce58" office:value-type="string" calcext:value-type="string">
            <text:p>192.168.1.1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6c</text:p>
          </table:table-cell>
          <table:table-cell table:style-name="ce58" office:value-type="string" calcext:value-type="string">
            <text:p>1.3.6.1.2.1.43.10.2.1.4.1.5</text:p>
          </table:table-cell>
          <table:table-cell table:style-name="ce58" office:value-type="string" calcext:value-type="string">
            <text:p>1.3.6.1.2.1.43.16.5.1.2.5</text:p>
          </table:table-cell>
          <table:table-cell table:number-columns-repeated="16367"/>
        </table:table-row>
        <table:table-row table:style-name="ro6">
          <table:table-cell/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Sansung (Secretaria)</text:p>
          </table:table-cell>
          <table:table-cell table:style-name="ce55" office:value-type="float" office:value="0.096" calcext:value-type="float">
            <text:p>R$ 0,10</text:p>
          </table:table-cell>
          <table:table-cell table:style-name="ce55" office:value-type="float" office:value="0" calcext:value-type="float">
            <text:p>R$ 0,00</text:p>
          </table:table-cell>
          <table:table-cell office:value-type="string" calcext:value-type="string">
            <text:p>sim</text:p>
          </table:table-cell>
          <table:table-cell table:style-name="ce58" office:value-type="string" calcext:value-type="string">
            <text:p>192.168.1.1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7c</text:p>
          </table:table-cell>
          <table:table-cell table:style-name="ce58" office:value-type="string" calcext:value-type="string">
            <text:p>1.3.6.1.2.1.43.10.2.1.4.1.6</text:p>
          </table:table-cell>
          <table:table-cell table:style-name="ce58" office:value-type="string" calcext:value-type="string">
            <text:p>1.3.6.1.2.1.43.16.5.1.2.6</text:p>
          </table:table-cell>
          <table:table-cell table:number-columns-repeated="16367"/>
        </table:table-row>
        <table:table-row table:style-name="ro6">
          <table:table-cell/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Ricoh SP 3710 (Secretaria) / Ricoh SP 377</text:p>
          </table:table-cell>
          <table:table-cell table:style-name="ce56" office:value-type="float" office:value="0.096" calcext:value-type="float">
            <text:p>R$ 0,10</text:p>
          </table:table-cell>
          <table:table-cell table:style-name="ce57" office:value-type="float" office:value="0" calcext:value-type="float">
            <text:p>R$ 0,00</text:p>
          </table:table-cell>
          <table:table-cell office:value-type="string" calcext:value-type="string">
            <text:p>sim</text:p>
          </table:table-cell>
          <table:table-cell table:style-name="ce58" office:value-type="string" calcext:value-type="string">
            <text:p>192.168.1.1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8c</text:p>
          </table:table-cell>
          <table:table-cell table:style-name="ce58" office:value-type="string" calcext:value-type="string">
            <text:p>1.3.6.1.2.1.43.10.2.1.4.1.7</text:p>
          </table:table-cell>
          <table:table-cell table:style-name="ce58" office:value-type="string" calcext:value-type="string">
            <text:p>1.3.6.1.2.1.43.16.5.1.2.7</text:p>
          </table:table-cell>
          <table:table-cell/>
          <table:table-cell table:style-name="ce59" office:value-type="string" calcext:value-type="string">
            <text:p>Substituida em 02/02 numerador 122770</text:p>
          </table:table-cell>
          <table:table-cell table:number-columns-repeated="16365"/>
        </table:table-row>
        <table:table-row table:style-name="ro6">
          <table:table-cell/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Ricoh 4510 (Irmã Clarice)</text:p>
          </table:table-cell>
          <table:table-cell table:style-name="ce55" office:value-type="float" office:value="0.096" calcext:value-type="float">
            <text:p>R$ 0,10</text:p>
          </table:table-cell>
          <table:table-cell table:style-name="ce55" office:value-type="float" office:value="0" calcext:value-type="float">
            <text:p>R$ 0,00</text:p>
          </table:table-cell>
          <table:table-cell office:value-type="string" calcext:value-type="string">
            <text:p>sim</text:p>
          </table:table-cell>
          <table:table-cell table:style-name="ce58" office:value-type="string" calcext:value-type="string">
            <text:p>192.168.1.1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9c</text:p>
          </table:table-cell>
          <table:table-cell table:style-name="ce58" office:value-type="string" calcext:value-type="string">
            <text:p>1.3.6.1.2.1.43.10.2.1.4.1.8</text:p>
          </table:table-cell>
          <table:table-cell table:style-name="ce58" office:value-type="string" calcext:value-type="string">
            <text:p>1.3.6.1.2.1.43.16.5.1.2.8</text:p>
          </table:table-cell>
          <table:table-cell table:number-columns-repeated="16367"/>
        </table:table-row>
        <table:table-row table:style-name="ro6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annon (Elis) - 87</text:p>
          </table:table-cell>
          <table:table-cell table:style-name="ce54" office:value-type="float" office:value="0.19" calcext:value-type="float">
            <text:p>R$ 0,19</text:p>
          </table:table-cell>
          <table:table-cell table:style-name="ce55" office:value-type="float" office:value="0" calcext:value-type="float">
            <text:p>R$ 0,00</text:p>
          </table:table-cell>
          <table:table-cell office:value-type="string" calcext:value-type="string">
            <text:p>sim</text:p>
          </table:table-cell>
          <table:table-cell table:style-name="ce58" office:value-type="string" calcext:value-type="string">
            <text:p>192.168.1.18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10c</text:p>
          </table:table-cell>
          <table:table-cell table:style-name="ce58" office:value-type="string" calcext:value-type="string">
            <text:p>1.3.6.1.2.1.43.10.2.1.4.1.9</text:p>
          </table:table-cell>
          <table:table-cell table:style-name="ce58" office:value-type="string" calcext:value-type="string">
            <text:p>1.3.6.1.2.1.43.16.5.1.2.9</text:p>
          </table:table-cell>
          <table:table-cell table:number-columns-repeated="16367"/>
        </table:table-row>
        <table:table-row table:style-name="ro6">
          <table:table-cell/>
          <table:table-cell table:style-name="ce53" office:value-type="float" office:value="10" calcext:value-type="float">
            <text:p>10</text:p>
          </table:table-cell>
          <table:table-cell table:style-name="ce6" office:value-type="string" calcext:value-type="string">
            <text:p>Brother (B1 - Lado da Lexmark) - 04 / Canon - 64 - TROCA 03</text:p>
          </table:table-cell>
          <table:table-cell table:style-name="ce54" office:value-type="float" office:value="0.19" calcext:value-type="float">
            <text:p>R$ 0,19</text:p>
          </table:table-cell>
          <table:table-cell table:style-name="ce54" office:value-type="float" office:value="0" calcext:value-type="float">
            <text:p>R$ 0,00</text:p>
          </table:table-cell>
          <table:table-cell office:value-type="string" calcext:value-type="string">
            <text:p>sim</text:p>
          </table:table-cell>
          <table:table-cell table:style-name="ce58" office:value-type="string" calcext:value-type="string">
            <text:p>192.168.1.1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11c</text:p>
          </table:table-cell>
          <table:table-cell table:style-name="ce58" office:value-type="string" calcext:value-type="string">
            <text:p>1.3.6.1.2.1.43.10.2.1.4.1.10</text:p>
          </table:table-cell>
          <table:table-cell table:style-name="ce58" office:value-type="string" calcext:value-type="string">
            <text:p>1.3.6.1.2.1.43.16.5.1.2.10</text:p>
          </table:table-cell>
          <table:table-cell/>
          <table:table-cell table:style-name="ce59" office:value-type="string" calcext:value-type="string">
            <text:p>Instalada em 02/02 numerador inicial 0</text:p>
          </table:table-cell>
          <table:table-cell table:number-columns-repeated="16365"/>
        </table:table-row>
        <table:table-row table:style-name="ro6"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Ricoh SP 3710 (Secretaria) / Ricoh SP 377 - TROCA 07</text:p>
          </table:table-cell>
          <table:table-cell table:style-name="ce54" office:value-type="float" office:value="0.096" calcext:value-type="float">
            <text:p>R$ 0,10</text:p>
          </table:table-cell>
          <table:table-cell table:style-name="ce55" office:value-type="float" office:value="0" calcext:value-type="float">
            <text:p>R$ 0,00</text:p>
          </table:table-cell>
          <table:table-cell office:value-type="string" calcext:value-type="string">
            <text:p>sim</text:p>
          </table:table-cell>
          <table:table-cell table:style-name="ce58" office:value-type="string" calcext:value-type="string">
            <text:p>192.168.1.2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12c</text:p>
          </table:table-cell>
          <table:table-cell table:style-name="ce58" office:value-type="string" calcext:value-type="string">
            <text:p>1.3.6.1.2.1.43.10.2.1.4.1.11</text:p>
          </table:table-cell>
          <table:table-cell table:style-name="ce58" office:value-type="string" calcext:value-type="string">
            <text:p>1.3.6.1.2.1.43.16.5.1.2.11</text:p>
          </table:table-cell>
          <table:table-cell/>
          <table:table-cell table:style-name="ce59" office:value-type="string" calcext:value-type="string">
            <text:p>Instalada em 20/04 numerador inicial 424881</text:p>
          </table:table-cell>
          <table:table-cell table:number-columns-repeated="16365"/>
        </table:table-row>
        <table:table-row table:style-name="ro6" table:number-rows-repeated="968">
          <table:table-cell table:number-columns-repeated="16378"/>
        </table:table-row>
        <table:table-row table:style-name="ro1" table:number-rows-repeated="1047576">
          <table:table-cell table:number-columns-repeated="16378"/>
        </table:table-row>
        <table:table-row table:style-name="ro7" table:number-rows-repeated="19">
          <table:table-cell table:number-columns-repeated="16378"/>
        </table:table-row>
        <table:table-row table:style-name="ro7">
          <table:table-cell table:number-columns-repeated="16378"/>
        </table:table-row>
      </table:table>
      <table:table table:name="Leituras_Contadores" table:style-name="ta3">
        <table:table-column table:style-name="co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number-columns-repeated="12" table:default-cell-style-name="Default"/>
        <table:table-column table:style-name="co6" table:number-columns-repeated="10" table:default-cell-style-name="Default"/>
        <table:table-column table:style-name="co7" table:number-columns-repeated="16358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LEITURAS BRUTAS DOS CONTADORES (INPUT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quipamento</text:p>
          </table:table-cell>
          <table:table-cell table:style-name="ce10" office:value-type="string" calcext:value-type="string">
            <text:p>Leitura Inicial</text:p>
          </table:table-cell>
          <table:table-cell table:style-name="ce10" office:value-type="string" calcext:value-type="string">
            <text:p>Janeiro</text:p>
          </table:table-cell>
          <table:table-cell table:style-name="ce10" office:value-type="string" calcext:value-type="string">
            <text:p>Fevereiro</text:p>
          </table:table-cell>
          <table:table-cell table:style-name="ce10" office:value-type="string" calcext:value-type="string">
            <text:p>Março</text:p>
          </table:table-cell>
          <table:table-cell table:style-name="ce10" office:value-type="string" calcext:value-type="string">
            <text:p>Abril</text:p>
          </table:table-cell>
          <table:table-cell table:style-name="ce10" office:value-type="string" calcext:value-type="string">
            <text:p>Maio</text:p>
          </table:table-cell>
          <table:table-cell table:style-name="ce10" office:value-type="string" calcext:value-type="string">
            <text:p>Junho</text:p>
          </table:table-cell>
          <table:table-cell table:style-name="ce10" office:value-type="string" calcext:value-type="string">
            <text:p>Julho</text:p>
          </table:table-cell>
          <table:table-cell table:style-name="ce10" office:value-type="string" calcext:value-type="string">
            <text:p>Agosto</text:p>
          </table:table-cell>
          <table:table-cell table:style-name="ce10" office:value-type="string" calcext:value-type="string">
            <text:p>Setembro</text:p>
          </table:table-cell>
          <table:table-cell table:style-name="ce10" office:value-type="string" calcext:value-type="string">
            <text:p>Outubro</text:p>
          </table:table-cell>
          <table:table-cell table:style-name="ce10" office:value-type="string" calcext:value-type="string">
            <text:p>Novembro</text:p>
          </table:table-cell>
          <table:table-cell table:style-name="ce10" office:value-type="string" calcext:value-type="string">
            <text:p>Dezembro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1" calcext:value-type="float">
            <text:p>1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25" office:value-type="float" office:value="317341" calcext:value-type="float">
            <text:p>317.341,00</text:p>
          </table:table-cell>
          <table:table-cell table:style-name="ce25" office:value-type="float" office:value="317508" calcext:value-type="float">
            <text:p>317.508,00</text:p>
          </table:table-cell>
          <table:table-cell table:style-name="ce25" office:value-type="float" office:value="322213" calcext:value-type="float">
            <text:p>322.213,00</text:p>
          </table:table-cell>
          <table:table-cell table:style-name="ce25" office:value-type="float" office:value="328792" calcext:value-type="float">
            <text:p>328.792,00</text:p>
          </table:table-cell>
          <table:table-cell table:style-name="ce25" office:value-type="float" office:value="335034" calcext:value-type="float">
            <text:p>335.034,00</text:p>
          </table:table-cell>
          <table:table-cell table:style-name="ce25" office:value-type="float" office:value="342344" calcext:value-type="float">
            <text:p>342.344,00</text:p>
          </table:table-cell>
          <table:table-cell table:style-name="ce29"/>
          <table:table-cell table:style-name="ce6" table:number-columns-repeated="6"/>
          <table:table-cell table:number-columns-repeated="16368"/>
        </table:table-row>
        <table:table-row table:style-name="ro5">
          <table:table-cell/>
          <table:table-cell table:style-name="ce19" office:value-type="float" office:value="2" calcext:value-type="float">
            <text:p>2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26" office:value-type="float" office:value="23694" calcext:value-type="float">
            <text:p>23.694,00</text:p>
          </table:table-cell>
          <table:table-cell table:style-name="ce26" office:value-type="float" office:value="24002" calcext:value-type="float">
            <text:p>24.002,00</text:p>
          </table:table-cell>
          <table:table-cell table:style-name="ce26" office:value-type="float" office:value="30162" calcext:value-type="float">
            <text:p>30.162,00</text:p>
          </table:table-cell>
          <table:table-cell table:style-name="ce26" office:value-type="float" office:value="37760" calcext:value-type="float">
            <text:p>37.760,00</text:p>
          </table:table-cell>
          <table:table-cell table:style-name="ce26" office:value-type="float" office:value="42357" calcext:value-type="float">
            <text:p>42.357,00</text:p>
          </table:table-cell>
          <table:table-cell table:style-name="ce26" office:value-type="float" office:value="47888" calcext:value-type="float">
            <text:p>47.888,00</text:p>
          </table:table-cell>
          <table:table-cell table:style-name="ce19" table:number-columns-repeated="7"/>
          <table:table-cell table:number-columns-repeated="16368"/>
        </table:table-row>
        <table:table-row table:style-name="ro5">
          <table:table-cell/>
          <table:table-cell table:style-name="ce6" office:value-type="float" office:value="3" calcext:value-type="float">
            <text:p>3</text:p>
          </table:table-cell>
          <table:table-cell table:style-name="ce7" table:formula="of:=[#REF!]" office:value-type="string" office:string-value="" calcext:value-type="error">
            <text:p>#REF!</text:p>
          </table:table-cell>
          <table:table-cell table:style-name="ce25" office:value-type="float" office:value="147158" calcext:value-type="float">
            <text:p>147.158,00</text:p>
          </table:table-cell>
          <table:table-cell table:style-name="ce25" office:value-type="float" office:value="147165" calcext:value-type="float">
            <text:p>147.165,00</text:p>
          </table:table-cell>
          <table:table-cell table:style-name="ce25" office:value-type="float" office:value="147786" calcext:value-type="float">
            <text:p>147.786,00</text:p>
          </table:table-cell>
          <table:table-cell table:style-name="ce25" table:number-columns-repeated="3"/>
          <table:table-cell table:style-name="ce6" table:number-columns-repeated="7"/>
          <table:table-cell table:number-columns-repeated="16368"/>
        </table:table-row>
        <table:table-row table:style-name="ro5">
          <table:table-cell/>
          <table:table-cell table:style-name="ce19" office:value-type="float" office:value="4" calcext:value-type="float">
            <text:p>4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26" office:value-type="float" office:value="510310" calcext:value-type="float">
            <text:p>510.310,00</text:p>
          </table:table-cell>
          <table:table-cell table:style-name="ce26" office:value-type="float" office:value="510329" calcext:value-type="float">
            <text:p>510.329,00</text:p>
          </table:table-cell>
          <table:table-cell table:style-name="ce26" office:value-type="float" office:value="512146" calcext:value-type="float">
            <text:p>512.146,00</text:p>
          </table:table-cell>
          <table:table-cell table:style-name="ce26" office:value-type="float" office:value="516692" calcext:value-type="float">
            <text:p>516.692,00</text:p>
          </table:table-cell>
          <table:table-cell table:style-name="ce26" office:value-type="float" office:value="523698" calcext:value-type="float">
            <text:p>523.698,00</text:p>
          </table:table-cell>
          <table:table-cell table:style-name="ce26" office:value-type="float" office:value="529010" calcext:value-type="float">
            <text:p>529.010,00</text:p>
          </table:table-cell>
          <table:table-cell table:style-name="ce19" table:number-columns-repeated="7"/>
          <table:table-cell table:number-columns-repeated="16368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25" office:value-type="float" office:value="63915" calcext:value-type="float">
            <text:p>63.915,00</text:p>
          </table:table-cell>
          <table:table-cell table:style-name="ce25" office:value-type="float" office:value="64061" calcext:value-type="float">
            <text:p>64.061,00</text:p>
          </table:table-cell>
          <table:table-cell table:style-name="ce25" office:value-type="float" office:value="64377" calcext:value-type="float">
            <text:p>64.377,00</text:p>
          </table:table-cell>
          <table:table-cell table:style-name="ce25" office:value-type="float" office:value="64518" calcext:value-type="float">
            <text:p>64.518,00</text:p>
          </table:table-cell>
          <table:table-cell table:style-name="ce25" office:value-type="float" office:value="64666" calcext:value-type="float">
            <text:p>64.666,00</text:p>
          </table:table-cell>
          <table:table-cell table:style-name="ce25" office:value-type="float" office:value="64969" calcext:value-type="float">
            <text:p>64.969,00</text:p>
          </table:table-cell>
          <table:table-cell table:style-name="ce6" table:number-columns-repeated="7"/>
          <table:table-cell table:number-columns-repeated="16368"/>
        </table:table-row>
        <table:table-row table:style-name="ro5">
          <table:table-cell/>
          <table:table-cell table:style-name="ce19" office:value-type="float" office:value="6" calcext:value-type="float">
            <text:p>6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26" office:value-type="float" office:value="130014" calcext:value-type="float">
            <text:p>130.014,00</text:p>
          </table:table-cell>
          <table:table-cell table:style-name="ce26" office:value-type="float" office:value="133318" calcext:value-type="float">
            <text:p>133.318,00</text:p>
          </table:table-cell>
          <table:table-cell table:style-name="ce26" office:value-type="float" office:value="136388" calcext:value-type="float">
            <text:p>136.388,00</text:p>
          </table:table-cell>
          <table:table-cell table:style-name="ce26" office:value-type="float" office:value="138335" calcext:value-type="float">
            <text:p>138.335,00</text:p>
          </table:table-cell>
          <table:table-cell table:style-name="ce26" office:value-type="float" office:value="140798" calcext:value-type="float">
            <text:p>140.798,00</text:p>
          </table:table-cell>
          <table:table-cell table:style-name="ce26" office:value-type="float" office:value="142792" calcext:value-type="float">
            <text:p>142.792,00</text:p>
          </table:table-cell>
          <table:table-cell table:style-name="ce28"/>
          <table:table-cell table:style-name="ce19" table:number-columns-repeated="6"/>
          <table:table-cell table:number-columns-repeated="16368"/>
        </table:table-row>
        <table:table-row table:style-name="ro5">
          <table:table-cell/>
          <table:table-cell table:style-name="ce6" office:value-type="float" office:value="7" calcext:value-type="float">
            <text:p>7</text:p>
          </table:table-cell>
          <table:table-cell table:style-name="ce7" table:formula="of:=[#REF!]" office:value-type="string" office:string-value="" calcext:value-type="error">
            <text:p>#REF!</text:p>
          </table:table-cell>
          <table:table-cell table:style-name="ce25" office:value-type="float" office:value="117623" calcext:value-type="float">
            <text:p>117.623,00</text:p>
          </table:table-cell>
          <table:table-cell table:style-name="ce25" office:value-type="float" office:value="119241" calcext:value-type="float">
            <text:p>119.241,00</text:p>
          </table:table-cell>
          <table:table-cell table:style-name="ce25" office:value-type="float" office:value="120224" calcext:value-type="float">
            <text:p>120.224,00</text:p>
          </table:table-cell>
          <table:table-cell table:style-name="ce25" office:value-type="float" office:value="121513" calcext:value-type="float">
            <text:p>121.513,00</text:p>
          </table:table-cell>
          <table:table-cell table:style-name="ce25" office:value-type="float" office:value="122750" calcext:value-type="float">
            <text:p>122.750,00</text:p>
          </table:table-cell>
          <table:table-cell table:style-name="ce25"/>
          <table:table-cell table:style-name="ce6" table:number-columns-repeated="7"/>
          <table:table-cell table:number-columns-repeated="16368"/>
        </table:table-row>
        <table:table-row table:style-name="ro5">
          <table:table-cell/>
          <table:table-cell table:style-name="ce19" office:value-type="float" office:value="8" calcext:value-type="float">
            <text:p>8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26" office:value-type="float" office:value="293328" calcext:value-type="float">
            <text:p>293.328,00</text:p>
          </table:table-cell>
          <table:table-cell table:style-name="ce26" office:value-type="float" office:value="293425" calcext:value-type="float">
            <text:p>293.425,00</text:p>
          </table:table-cell>
          <table:table-cell table:style-name="ce26" office:value-type="float" office:value="293447" calcext:value-type="float">
            <text:p>293.447,00</text:p>
          </table:table-cell>
          <table:table-cell table:style-name="ce26" office:value-type="float" office:value="293533" calcext:value-type="float">
            <text:p>293.533,00</text:p>
          </table:table-cell>
          <table:table-cell table:style-name="ce26" office:value-type="float" office:value="293619" calcext:value-type="float">
            <text:p>293.619,00</text:p>
          </table:table-cell>
          <table:table-cell table:style-name="ce26" office:value-type="float" office:value="293904" calcext:value-type="float">
            <text:p>293.904,00</text:p>
          </table:table-cell>
          <table:table-cell table:style-name="ce19" table:number-columns-repeated="7"/>
          <table:table-cell table:number-columns-repeated="16368"/>
        </table:table-row>
        <table:table-row table:style-name="ro5">
          <table:table-cell/>
          <table:table-cell table:style-name="ce6" office:value-type="float" office:value="9" calcext:value-type="float">
            <text:p>9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25" office:value-type="float" office:value="35726" calcext:value-type="float">
            <text:p>35.726,00</text:p>
          </table:table-cell>
          <table:table-cell table:style-name="ce25" office:value-type="float" office:value="35834" calcext:value-type="float">
            <text:p>35.834,00</text:p>
          </table:table-cell>
          <table:table-cell table:style-name="ce25" office:value-type="float" office:value="36646" calcext:value-type="float">
            <text:p>36.646,00</text:p>
          </table:table-cell>
          <table:table-cell table:style-name="ce25" office:value-type="float" office:value="37098" calcext:value-type="float">
            <text:p>37.098,00</text:p>
          </table:table-cell>
          <table:table-cell table:style-name="ce25" office:value-type="float" office:value="37746" calcext:value-type="float">
            <text:p>37.746,00</text:p>
          </table:table-cell>
          <table:table-cell table:style-name="ce25" office:value-type="float" office:value="38807" calcext:value-type="float">
            <text:p>38.807,00</text:p>
          </table:table-cell>
          <table:table-cell table:style-name="ce6" table:number-columns-repeated="7"/>
          <table:table-cell table:number-columns-repeated="16368"/>
        </table:table-row>
        <table:table-row table:style-name="ro5">
          <table:table-cell/>
          <table:table-cell table:style-name="ce19" office:value-type="float" office:value="10" calcext:value-type="float">
            <text:p>10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number-columns-repeated="3" table:style-name="ce27" office:value-type="float" office:value="3811" calcext:value-type="float">
            <text:p>3.811,00</text:p>
          </table:table-cell>
          <table:table-cell table:style-name="ce25" office:value-type="float" office:value="9561" calcext:value-type="float">
            <text:p>9.561,00</text:p>
          </table:table-cell>
          <table:table-cell table:style-name="ce25" office:value-type="float" office:value="14636" calcext:value-type="float">
            <text:p>14.636,00</text:p>
          </table:table-cell>
          <table:table-cell table:style-name="ce25" office:value-type="float" office:value="22627" calcext:value-type="float">
            <text:p>22.627,00</text:p>
          </table:table-cell>
          <table:table-cell table:style-name="ce19" table:number-columns-repeated="7"/>
          <table:table-cell table:number-columns-repeated="16368"/>
        </table:table-row>
        <table:table-row table:style-name="ro5">
          <table:table-cell/>
          <table:table-cell table:style-name="ce6" office:value-type="float" office:value="11" calcext:value-type="float">
            <text:p>11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number-columns-repeated="5" table:style-name="ce27" office:value-type="float" office:value="424881" calcext:value-type="float">
            <text:p>424.881,00</text:p>
          </table:table-cell>
          <table:table-cell table:style-name="ce25" office:value-type="float" office:value="425344" calcext:value-type="float">
            <text:p>425.344,00</text:p>
          </table:table-cell>
          <table:table-cell table:style-name="ce6" table:number-columns-repeated="7"/>
          <table:table-cell table:number-columns-repeated="16368"/>
        </table:table-row>
        <table:table-row table:style-name="ro5">
          <table:table-cell/>
          <table:table-cell table:style-name="ce19" office:value-type="float" office:value="12" calcext:value-type="float">
            <text:p>12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28" table:number-columns-repeated="6"/>
          <table:table-cell table:style-name="ce19" table:number-columns-repeated="7"/>
          <table:table-cell table:number-columns-repeated="16368"/>
        </table:table-row>
        <table:table-row table:style-name="ro5">
          <table:table-cell/>
          <table:table-cell table:style-name="ce6" office:value-type="float" office:value="13" calcext:value-type="float">
            <text:p>13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29" table:number-columns-repeated="6"/>
          <table:table-cell table:style-name="ce6" table:number-columns-repeated="7"/>
          <table:table-cell table:number-columns-repeated="16368"/>
        </table:table-row>
        <table:table-row table:style-name="ro1" table:number-rows-repeated="3">
          <table:table-cell table:number-columns-repeated="16384"/>
        </table:table-row>
        <table:table-row table:style-name="ro6" table:number-rows-repeated="980">
          <table:table-cell table:number-columns-repeated="16384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olume_Impressao" table:style-name="ta4">
        <table:table-column table:style-name="co1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0" table:default-cell-style-name="Default"/>
        <table:table-column table:style-name="co7" table:number-columns-repeated="16358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VOLUME DE PÁGINAS IMPRESSAS POR MÊS (FÓRMULA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quipamento</text:p>
          </table:table-cell>
          <table:table-cell table:style-name="ce10" office:value-type="string" calcext:value-type="string">
            <text:p>Janeiro</text:p>
          </table:table-cell>
          <table:table-cell table:style-name="ce10" office:value-type="string" calcext:value-type="string">
            <text:p>Fevereiro</text:p>
          </table:table-cell>
          <table:table-cell table:style-name="ce10" office:value-type="string" calcext:value-type="string">
            <text:p>Março</text:p>
          </table:table-cell>
          <table:table-cell table:style-name="ce10" office:value-type="string" calcext:value-type="string">
            <text:p>Abril</text:p>
          </table:table-cell>
          <table:table-cell table:style-name="ce10" office:value-type="string" calcext:value-type="string">
            <text:p>Maio</text:p>
          </table:table-cell>
          <table:table-cell table:style-name="ce10" office:value-type="string" calcext:value-type="string">
            <text:p>Junho</text:p>
          </table:table-cell>
          <table:table-cell table:style-name="ce10" office:value-type="string" calcext:value-type="string">
            <text:p>Julho</text:p>
          </table:table-cell>
          <table:table-cell table:style-name="ce10" office:value-type="string" calcext:value-type="string">
            <text:p>Agosto</text:p>
          </table:table-cell>
          <table:table-cell table:style-name="ce10" office:value-type="string" calcext:value-type="string">
            <text:p>Setembro</text:p>
          </table:table-cell>
          <table:table-cell table:style-name="ce10" office:value-type="string" calcext:value-type="string">
            <text:p>Outubro</text:p>
          </table:table-cell>
          <table:table-cell table:style-name="ce10" office:value-type="string" calcext:value-type="string">
            <text:p>Novembro</text:p>
          </table:table-cell>
          <table:table-cell table:style-name="ce10" office:value-type="string" calcext:value-type="string">
            <text:p>Dezembro</text:p>
          </table:table-cell>
          <table:table-cell table:style-name="ce10" office:value-type="string" calcext:value-type="string">
            <text:p>Total Ano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1" calcext:value-type="float">
            <text:p>1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1" table:formula="of:=IF([$Leituras_Contadores.E5]=&quot;&quot;; &quot;&quot;; [$Leituras_Contadores.E5]-[$Leituras_Contadores.D5])" office:value-type="float" office:value="167" calcext:value-type="float">
            <text:p>167</text:p>
          </table:table-cell>
          <table:table-cell table:style-name="ce11" table:formula="of:=IF([$Leituras_Contadores.F5]=&quot;&quot;; &quot;&quot;; [$Leituras_Contadores.F5]-[$Leituras_Contadores.E5])" office:value-type="float" office:value="4705" calcext:value-type="float">
            <text:p>4.705</text:p>
          </table:table-cell>
          <table:table-cell table:style-name="ce11" table:formula="of:=IF([$Leituras_Contadores.G5]=&quot;&quot;; &quot;&quot;; [$Leituras_Contadores.G5]-[$Leituras_Contadores.F5])" office:value-type="float" office:value="6579" calcext:value-type="float">
            <text:p>6.579</text:p>
          </table:table-cell>
          <table:table-cell table:style-name="ce11" table:formula="of:=IF([$Leituras_Contadores.H5]=&quot;&quot;; &quot;&quot;; [$Leituras_Contadores.H5]-[$Leituras_Contadores.G5])" office:value-type="float" office:value="6242" calcext:value-type="float">
            <text:p>6.242</text:p>
          </table:table-cell>
          <table:table-cell table:style-name="ce11" table:formula="of:=IF([$Leituras_Contadores.I5]=&quot;&quot;; &quot;&quot;; [$Leituras_Contadores.I5]-[$Leituras_Contadores.H5])" office:value-type="float" office:value="7310" calcext:value-type="float">
            <text:p>7.310</text:p>
          </table:table-cell>
          <table:table-cell table:style-name="ce11" table:formula="of:=IF([$Leituras_Contadores.J5]=&quot;&quot;; &quot;&quot;; [$Leituras_Contadores.J5]-[$Leituras_Contadores.I5])">
            <text:p/>
          </table:table-cell>
          <table:table-cell table:style-name="ce11" table:formula="of:=IF([$Leituras_Contadores.K5]=&quot;&quot;; &quot;&quot;; [$Leituras_Contadores.K5]-[$Leituras_Contadores.J5])">
            <text:p/>
          </table:table-cell>
          <table:table-cell table:style-name="ce11" table:formula="of:=IF([$Leituras_Contadores.L5]=&quot;&quot;; &quot;&quot;; [$Leituras_Contadores.L5]-[$Leituras_Contadores.K5])">
            <text:p/>
          </table:table-cell>
          <table:table-cell table:style-name="ce11" table:formula="of:=IF([$Leituras_Contadores.M5]=&quot;&quot;; &quot;&quot;; [$Leituras_Contadores.M5]-[$Leituras_Contadores.L5])">
            <text:p/>
          </table:table-cell>
          <table:table-cell table:style-name="ce11" table:formula="of:=IF([$Leituras_Contadores.N5]=&quot;&quot;; &quot;&quot;; [$Leituras_Contadores.N5]-[$Leituras_Contadores.M5])">
            <text:p/>
          </table:table-cell>
          <table:table-cell table:style-name="ce11" table:formula="of:=IF([$Leituras_Contadores.O5]=&quot;&quot;; &quot;&quot;; [$Leituras_Contadores.O5]-[$Leituras_Contadores.N5])">
            <text:p/>
          </table:table-cell>
          <table:table-cell table:style-name="ce11" table:formula="of:=IF([$Leituras_Contadores.P5]=&quot;&quot;; &quot;&quot;; [$Leituras_Contadores.P5]-[$Leituras_Contadores.O5])">
            <text:p/>
          </table:table-cell>
          <table:table-cell table:style-name="ce32" table:formula="of:=SUM([.D5:.O5])" office:value-type="float" office:value="25003" calcext:value-type="float">
            <text:p>25.003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2" calcext:value-type="float">
            <text:p>2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IF([$Leituras_Contadores.E6]=&quot;&quot;; &quot;&quot;; [$Leituras_Contadores.E6]-[$Leituras_Contadores.D6])" office:value-type="float" office:value="308" calcext:value-type="float">
            <text:p>308</text:p>
          </table:table-cell>
          <table:table-cell table:style-name="ce12" table:formula="of:=IF([$Leituras_Contadores.F6]=&quot;&quot;; &quot;&quot;; [$Leituras_Contadores.F6]-[$Leituras_Contadores.E6])" office:value-type="float" office:value="6160" calcext:value-type="float">
            <text:p>6.160</text:p>
          </table:table-cell>
          <table:table-cell table:style-name="ce12" table:formula="of:=IF([$Leituras_Contadores.G6]=&quot;&quot;; &quot;&quot;; [$Leituras_Contadores.G6]-[$Leituras_Contadores.F6])" office:value-type="float" office:value="7598" calcext:value-type="float">
            <text:p>7.598</text:p>
          </table:table-cell>
          <table:table-cell table:style-name="ce12" table:formula="of:=IF([$Leituras_Contadores.H6]=&quot;&quot;; &quot;&quot;; [$Leituras_Contadores.H6]-[$Leituras_Contadores.G6])" office:value-type="float" office:value="4597" calcext:value-type="float">
            <text:p>4.597</text:p>
          </table:table-cell>
          <table:table-cell table:style-name="ce12" table:formula="of:=IF([$Leituras_Contadores.I6]=&quot;&quot;; &quot;&quot;; [$Leituras_Contadores.I6]-[$Leituras_Contadores.H6])" office:value-type="float" office:value="5531" calcext:value-type="float">
            <text:p>5.531</text:p>
          </table:table-cell>
          <table:table-cell table:style-name="ce12" table:formula="of:=IF([$Leituras_Contadores.J6]=&quot;&quot;; &quot;&quot;; [$Leituras_Contadores.J6]-[$Leituras_Contadores.I6])">
            <text:p/>
          </table:table-cell>
          <table:table-cell table:style-name="ce12" table:formula="of:=IF([$Leituras_Contadores.K6]=&quot;&quot;; &quot;&quot;; [$Leituras_Contadores.K6]-[$Leituras_Contadores.J6])">
            <text:p/>
          </table:table-cell>
          <table:table-cell table:style-name="ce12" table:formula="of:=IF([$Leituras_Contadores.L6]=&quot;&quot;; &quot;&quot;; [$Leituras_Contadores.L6]-[$Leituras_Contadores.K6])">
            <text:p/>
          </table:table-cell>
          <table:table-cell table:style-name="ce12" table:formula="of:=IF([$Leituras_Contadores.M6]=&quot;&quot;; &quot;&quot;; [$Leituras_Contadores.M6]-[$Leituras_Contadores.L6])">
            <text:p/>
          </table:table-cell>
          <table:table-cell table:style-name="ce12" table:formula="of:=IF([$Leituras_Contadores.N6]=&quot;&quot;; &quot;&quot;; [$Leituras_Contadores.N6]-[$Leituras_Contadores.M6])">
            <text:p/>
          </table:table-cell>
          <table:table-cell table:style-name="ce12" table:formula="of:=IF([$Leituras_Contadores.O6]=&quot;&quot;; &quot;&quot;; [$Leituras_Contadores.O6]-[$Leituras_Contadores.N6])">
            <text:p/>
          </table:table-cell>
          <table:table-cell table:style-name="ce12" table:formula="of:=IF([$Leituras_Contadores.P6]=&quot;&quot;; &quot;&quot;; [$Leituras_Contadores.P6]-[$Leituras_Contadores.O6])">
            <text:p/>
          </table:table-cell>
          <table:table-cell table:style-name="ce33" table:formula="of:=SUM([.D6:.O6])" office:value-type="float" office:value="24194" calcext:value-type="float">
            <text:p>24.194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3" calcext:value-type="float">
            <text:p>3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1" table:formula="of:=IF([$Leituras_Contadores.E7]=&quot;&quot;; &quot;&quot;; [$Leituras_Contadores.E7]-[$Leituras_Contadores.D7])" office:value-type="float" office:value="7" calcext:value-type="float">
            <text:p>7</text:p>
          </table:table-cell>
          <table:table-cell table:style-name="ce11" table:formula="of:=IF([$Leituras_Contadores.F7]=&quot;&quot;; &quot;&quot;; [$Leituras_Contadores.F7]-[$Leituras_Contadores.E7])" office:value-type="float" office:value="621" calcext:value-type="float">
            <text:p>621</text:p>
          </table:table-cell>
          <table:table-cell table:style-name="ce11" table:formula="of:=IF([$Leituras_Contadores.G7]=&quot;&quot;; &quot;&quot;; [$Leituras_Contadores.G7]-[$Leituras_Contadores.F7])">
            <text:p/>
          </table:table-cell>
          <table:table-cell table:style-name="ce11" table:formula="of:=IF([$Leituras_Contadores.H7]=&quot;&quot;; &quot;&quot;; [$Leituras_Contadores.H7]-[$Leituras_Contadores.G7])">
            <text:p/>
          </table:table-cell>
          <table:table-cell table:style-name="ce11" table:formula="of:=IF([$Leituras_Contadores.I7]=&quot;&quot;; &quot;&quot;; [$Leituras_Contadores.I7]-[$Leituras_Contadores.H7])">
            <text:p/>
          </table:table-cell>
          <table:table-cell table:style-name="ce11" table:formula="of:=IF([$Leituras_Contadores.J7]=&quot;&quot;; &quot;&quot;; [$Leituras_Contadores.J7]-[$Leituras_Contadores.I7])">
            <text:p/>
          </table:table-cell>
          <table:table-cell table:style-name="ce11" table:formula="of:=IF([$Leituras_Contadores.K7]=&quot;&quot;; &quot;&quot;; [$Leituras_Contadores.K7]-[$Leituras_Contadores.J7])">
            <text:p/>
          </table:table-cell>
          <table:table-cell table:style-name="ce11" table:formula="of:=IF([$Leituras_Contadores.L7]=&quot;&quot;; &quot;&quot;; [$Leituras_Contadores.L7]-[$Leituras_Contadores.K7])">
            <text:p/>
          </table:table-cell>
          <table:table-cell table:style-name="ce11" table:formula="of:=IF([$Leituras_Contadores.M7]=&quot;&quot;; &quot;&quot;; [$Leituras_Contadores.M7]-[$Leituras_Contadores.L7])">
            <text:p/>
          </table:table-cell>
          <table:table-cell table:style-name="ce11" table:formula="of:=IF([$Leituras_Contadores.N7]=&quot;&quot;; &quot;&quot;; [$Leituras_Contadores.N7]-[$Leituras_Contadores.M7])">
            <text:p/>
          </table:table-cell>
          <table:table-cell table:style-name="ce11" table:formula="of:=IF([$Leituras_Contadores.O7]=&quot;&quot;; &quot;&quot;; [$Leituras_Contadores.O7]-[$Leituras_Contadores.N7])">
            <text:p/>
          </table:table-cell>
          <table:table-cell table:style-name="ce11" table:formula="of:=IF([$Leituras_Contadores.P7]=&quot;&quot;; &quot;&quot;; [$Leituras_Contadores.P7]-[$Leituras_Contadores.O7])">
            <text:p/>
          </table:table-cell>
          <table:table-cell table:style-name="ce32" table:formula="of:=SUM([.D7:.O7])" office:value-type="float" office:value="628" calcext:value-type="float">
            <text:p>628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4" calcext:value-type="float">
            <text:p>4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IF([$Leituras_Contadores.E8]=&quot;&quot;; &quot;&quot;; [$Leituras_Contadores.E8]-[$Leituras_Contadores.D8])" office:value-type="float" office:value="19" calcext:value-type="float">
            <text:p>19</text:p>
          </table:table-cell>
          <table:table-cell table:style-name="ce12" table:formula="of:=IF([$Leituras_Contadores.F8]=&quot;&quot;; &quot;&quot;; [$Leituras_Contadores.F8]-[$Leituras_Contadores.E8])" office:value-type="float" office:value="1817" calcext:value-type="float">
            <text:p>1.817</text:p>
          </table:table-cell>
          <table:table-cell table:style-name="ce12" table:formula="of:=IF([$Leituras_Contadores.G8]=&quot;&quot;; &quot;&quot;; [$Leituras_Contadores.G8]-[$Leituras_Contadores.F8])" office:value-type="float" office:value="4546" calcext:value-type="float">
            <text:p>4.546</text:p>
          </table:table-cell>
          <table:table-cell table:style-name="ce12" table:formula="of:=IF([$Leituras_Contadores.H8]=&quot;&quot;; &quot;&quot;; [$Leituras_Contadores.H8]-[$Leituras_Contadores.G8])" office:value-type="float" office:value="7006" calcext:value-type="float">
            <text:p>7.006</text:p>
          </table:table-cell>
          <table:table-cell table:style-name="ce12" table:formula="of:=IF([$Leituras_Contadores.I8]=&quot;&quot;; &quot;&quot;; [$Leituras_Contadores.I8]-[$Leituras_Contadores.H8])" office:value-type="float" office:value="5312" calcext:value-type="float">
            <text:p>5.312</text:p>
          </table:table-cell>
          <table:table-cell table:style-name="ce12" table:formula="of:=IF([$Leituras_Contadores.J8]=&quot;&quot;; &quot;&quot;; [$Leituras_Contadores.J8]-[$Leituras_Contadores.I8])">
            <text:p/>
          </table:table-cell>
          <table:table-cell table:style-name="ce12" table:formula="of:=IF([$Leituras_Contadores.K8]=&quot;&quot;; &quot;&quot;; [$Leituras_Contadores.K8]-[$Leituras_Contadores.J8])">
            <text:p/>
          </table:table-cell>
          <table:table-cell table:style-name="ce12" table:formula="of:=IF([$Leituras_Contadores.L8]=&quot;&quot;; &quot;&quot;; [$Leituras_Contadores.L8]-[$Leituras_Contadores.K8])">
            <text:p/>
          </table:table-cell>
          <table:table-cell table:style-name="ce12" table:formula="of:=IF([$Leituras_Contadores.M8]=&quot;&quot;; &quot;&quot;; [$Leituras_Contadores.M8]-[$Leituras_Contadores.L8])">
            <text:p/>
          </table:table-cell>
          <table:table-cell table:style-name="ce12" table:formula="of:=IF([$Leituras_Contadores.N8]=&quot;&quot;; &quot;&quot;; [$Leituras_Contadores.N8]-[$Leituras_Contadores.M8])">
            <text:p/>
          </table:table-cell>
          <table:table-cell table:style-name="ce12" table:formula="of:=IF([$Leituras_Contadores.O8]=&quot;&quot;; &quot;&quot;; [$Leituras_Contadores.O8]-[$Leituras_Contadores.N8])">
            <text:p/>
          </table:table-cell>
          <table:table-cell table:style-name="ce12" table:formula="of:=IF([$Leituras_Contadores.P8]=&quot;&quot;; &quot;&quot;; [$Leituras_Contadores.P8]-[$Leituras_Contadores.O8])">
            <text:p/>
          </table:table-cell>
          <table:table-cell table:style-name="ce33" table:formula="of:=SUM([.D8:.O8])" office:value-type="float" office:value="18700" calcext:value-type="float">
            <text:p>18.700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1" table:formula="of:=IF([$Leituras_Contadores.E9]=&quot;&quot;; &quot;&quot;; [$Leituras_Contadores.E9]-[$Leituras_Contadores.D9])" office:value-type="float" office:value="146" calcext:value-type="float">
            <text:p>146</text:p>
          </table:table-cell>
          <table:table-cell table:style-name="ce11" table:formula="of:=IF([$Leituras_Contadores.F9]=&quot;&quot;; &quot;&quot;; [$Leituras_Contadores.F9]-[$Leituras_Contadores.E9])" office:value-type="float" office:value="316" calcext:value-type="float">
            <text:p>316</text:p>
          </table:table-cell>
          <table:table-cell table:style-name="ce11" table:formula="of:=IF([$Leituras_Contadores.G9]=&quot;&quot;; &quot;&quot;; [$Leituras_Contadores.G9]-[$Leituras_Contadores.F9])" office:value-type="float" office:value="141" calcext:value-type="float">
            <text:p>141</text:p>
          </table:table-cell>
          <table:table-cell table:style-name="ce11" table:formula="of:=IF([$Leituras_Contadores.H9]=&quot;&quot;; &quot;&quot;; [$Leituras_Contadores.H9]-[$Leituras_Contadores.G9])" office:value-type="float" office:value="148" calcext:value-type="float">
            <text:p>148</text:p>
          </table:table-cell>
          <table:table-cell table:style-name="ce11" table:formula="of:=IF([$Leituras_Contadores.I9]=&quot;&quot;; &quot;&quot;; [$Leituras_Contadores.I9]-[$Leituras_Contadores.H9])" office:value-type="float" office:value="303" calcext:value-type="float">
            <text:p>303</text:p>
          </table:table-cell>
          <table:table-cell table:style-name="ce11" table:formula="of:=IF([$Leituras_Contadores.J9]=&quot;&quot;; &quot;&quot;; [$Leituras_Contadores.J9]-[$Leituras_Contadores.I9])">
            <text:p/>
          </table:table-cell>
          <table:table-cell table:style-name="ce11" table:formula="of:=IF([$Leituras_Contadores.K9]=&quot;&quot;; &quot;&quot;; [$Leituras_Contadores.K9]-[$Leituras_Contadores.J9])">
            <text:p/>
          </table:table-cell>
          <table:table-cell table:style-name="ce11" table:formula="of:=IF([$Leituras_Contadores.L9]=&quot;&quot;; &quot;&quot;; [$Leituras_Contadores.L9]-[$Leituras_Contadores.K9])">
            <text:p/>
          </table:table-cell>
          <table:table-cell table:style-name="ce11" table:formula="of:=IF([$Leituras_Contadores.M9]=&quot;&quot;; &quot;&quot;; [$Leituras_Contadores.M9]-[$Leituras_Contadores.L9])">
            <text:p/>
          </table:table-cell>
          <table:table-cell table:style-name="ce11" table:formula="of:=IF([$Leituras_Contadores.N9]=&quot;&quot;; &quot;&quot;; [$Leituras_Contadores.N9]-[$Leituras_Contadores.M9])">
            <text:p/>
          </table:table-cell>
          <table:table-cell table:style-name="ce11" table:formula="of:=IF([$Leituras_Contadores.O9]=&quot;&quot;; &quot;&quot;; [$Leituras_Contadores.O9]-[$Leituras_Contadores.N9])">
            <text:p/>
          </table:table-cell>
          <table:table-cell table:style-name="ce11" table:formula="of:=IF([$Leituras_Contadores.P9]=&quot;&quot;; &quot;&quot;; [$Leituras_Contadores.P9]-[$Leituras_Contadores.O9])">
            <text:p/>
          </table:table-cell>
          <table:table-cell table:style-name="ce32" table:formula="of:=SUM([.D9:.O9])" office:value-type="float" office:value="1054" calcext:value-type="float">
            <text:p>1.054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6" calcext:value-type="float">
            <text:p>6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IF([$Leituras_Contadores.E10]=&quot;&quot;; &quot;&quot;; [$Leituras_Contadores.E10]-[$Leituras_Contadores.D10])" office:value-type="float" office:value="3304" calcext:value-type="float">
            <text:p>3.304</text:p>
          </table:table-cell>
          <table:table-cell table:style-name="ce12" table:formula="of:=IF([$Leituras_Contadores.F10]=&quot;&quot;; &quot;&quot;; [$Leituras_Contadores.F10]-[$Leituras_Contadores.E10])" office:value-type="float" office:value="3070" calcext:value-type="float">
            <text:p>3.070</text:p>
          </table:table-cell>
          <table:table-cell table:style-name="ce12" table:formula="of:=IF([$Leituras_Contadores.G10]=&quot;&quot;; &quot;&quot;; [$Leituras_Contadores.G10]-[$Leituras_Contadores.F10])" office:value-type="float" office:value="1947" calcext:value-type="float">
            <text:p>1.947</text:p>
          </table:table-cell>
          <table:table-cell table:style-name="ce12" table:formula="of:=IF([$Leituras_Contadores.H10]=&quot;&quot;; &quot;&quot;; [$Leituras_Contadores.H10]-[$Leituras_Contadores.G10])" office:value-type="float" office:value="2463" calcext:value-type="float">
            <text:p>2.463</text:p>
          </table:table-cell>
          <table:table-cell table:style-name="ce12" table:formula="of:=IF([$Leituras_Contadores.I10]=&quot;&quot;; &quot;&quot;; [$Leituras_Contadores.I10]-[$Leituras_Contadores.H10])" office:value-type="float" office:value="1994" calcext:value-type="float">
            <text:p>1.994</text:p>
          </table:table-cell>
          <table:table-cell table:style-name="ce12" table:formula="of:=IF([$Leituras_Contadores.J10]=&quot;&quot;; &quot;&quot;; [$Leituras_Contadores.J10]-[$Leituras_Contadores.I10])">
            <text:p/>
          </table:table-cell>
          <table:table-cell table:style-name="ce12" table:formula="of:=IF([$Leituras_Contadores.K10]=&quot;&quot;; &quot;&quot;; [$Leituras_Contadores.K10]-[$Leituras_Contadores.J10])">
            <text:p/>
          </table:table-cell>
          <table:table-cell table:style-name="ce12" table:formula="of:=IF([$Leituras_Contadores.L10]=&quot;&quot;; &quot;&quot;; [$Leituras_Contadores.L10]-[$Leituras_Contadores.K10])">
            <text:p/>
          </table:table-cell>
          <table:table-cell table:style-name="ce12" table:formula="of:=IF([$Leituras_Contadores.M10]=&quot;&quot;; &quot;&quot;; [$Leituras_Contadores.M10]-[$Leituras_Contadores.L10])">
            <text:p/>
          </table:table-cell>
          <table:table-cell table:style-name="ce12" table:formula="of:=IF([$Leituras_Contadores.N10]=&quot;&quot;; &quot;&quot;; [$Leituras_Contadores.N10]-[$Leituras_Contadores.M10])">
            <text:p/>
          </table:table-cell>
          <table:table-cell table:style-name="ce12" table:formula="of:=IF([$Leituras_Contadores.O10]=&quot;&quot;; &quot;&quot;; [$Leituras_Contadores.O10]-[$Leituras_Contadores.N10])">
            <text:p/>
          </table:table-cell>
          <table:table-cell table:style-name="ce12" table:formula="of:=IF([$Leituras_Contadores.P10]=&quot;&quot;; &quot;&quot;; [$Leituras_Contadores.P10]-[$Leituras_Contadores.O10])">
            <text:p/>
          </table:table-cell>
          <table:table-cell table:style-name="ce33" table:formula="of:=SUM([.D10:.O10])" office:value-type="float" office:value="12778" calcext:value-type="float">
            <text:p>12.778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7" calcext:value-type="float">
            <text:p>7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1" table:formula="of:=IF([$Leituras_Contadores.E11]=&quot;&quot;; &quot;&quot;; [$Leituras_Contadores.E11]-[$Leituras_Contadores.D11])" office:value-type="float" office:value="1618" calcext:value-type="float">
            <text:p>1.618</text:p>
          </table:table-cell>
          <table:table-cell table:style-name="ce11" table:formula="of:=IF([$Leituras_Contadores.F11]=&quot;&quot;; &quot;&quot;; [$Leituras_Contadores.F11]-[$Leituras_Contadores.E11])" office:value-type="float" office:value="983" calcext:value-type="float">
            <text:p>983</text:p>
          </table:table-cell>
          <table:table-cell table:style-name="ce11" table:formula="of:=IF([$Leituras_Contadores.G11]=&quot;&quot;; &quot;&quot;; [$Leituras_Contadores.G11]-[$Leituras_Contadores.F11])" office:value-type="float" office:value="1289" calcext:value-type="float">
            <text:p>1.289</text:p>
          </table:table-cell>
          <table:table-cell table:style-name="ce11" table:formula="of:=IF([$Leituras_Contadores.H11]=&quot;&quot;; &quot;&quot;; [$Leituras_Contadores.H11]-[$Leituras_Contadores.G11])" office:value-type="float" office:value="1237" calcext:value-type="float">
            <text:p>1.237</text:p>
          </table:table-cell>
          <table:table-cell table:style-name="ce11" table:formula="of:=IF([$Leituras_Contadores.I11]=&quot;&quot;; &quot;&quot;; [$Leituras_Contadores.I11]-[$Leituras_Contadores.H11])">
            <text:p/>
          </table:table-cell>
          <table:table-cell table:style-name="ce11" table:formula="of:=IF([$Leituras_Contadores.J11]=&quot;&quot;; &quot;&quot;; [$Leituras_Contadores.J11]-[$Leituras_Contadores.I11])">
            <text:p/>
          </table:table-cell>
          <table:table-cell table:style-name="ce11" table:formula="of:=IF([$Leituras_Contadores.K11]=&quot;&quot;; &quot;&quot;; [$Leituras_Contadores.K11]-[$Leituras_Contadores.J11])">
            <text:p/>
          </table:table-cell>
          <table:table-cell table:style-name="ce11" table:formula="of:=IF([$Leituras_Contadores.L11]=&quot;&quot;; &quot;&quot;; [$Leituras_Contadores.L11]-[$Leituras_Contadores.K11])">
            <text:p/>
          </table:table-cell>
          <table:table-cell table:style-name="ce11" table:formula="of:=IF([$Leituras_Contadores.M11]=&quot;&quot;; &quot;&quot;; [$Leituras_Contadores.M11]-[$Leituras_Contadores.L11])">
            <text:p/>
          </table:table-cell>
          <table:table-cell table:style-name="ce11" table:formula="of:=IF([$Leituras_Contadores.N11]=&quot;&quot;; &quot;&quot;; [$Leituras_Contadores.N11]-[$Leituras_Contadores.M11])">
            <text:p/>
          </table:table-cell>
          <table:table-cell table:style-name="ce11" table:formula="of:=IF([$Leituras_Contadores.O11]=&quot;&quot;; &quot;&quot;; [$Leituras_Contadores.O11]-[$Leituras_Contadores.N11])">
            <text:p/>
          </table:table-cell>
          <table:table-cell table:style-name="ce11" table:formula="of:=IF([$Leituras_Contadores.P11]=&quot;&quot;; &quot;&quot;; [$Leituras_Contadores.P11]-[$Leituras_Contadores.O11])">
            <text:p/>
          </table:table-cell>
          <table:table-cell table:style-name="ce32" table:formula="of:=SUM([.D11:.O11])" office:value-type="float" office:value="5127" calcext:value-type="float">
            <text:p>5.127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8" calcext:value-type="float">
            <text:p>8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IF([$Leituras_Contadores.E12]=&quot;&quot;; &quot;&quot;; [$Leituras_Contadores.E12]-[$Leituras_Contadores.D12])" office:value-type="float" office:value="97" calcext:value-type="float">
            <text:p>97</text:p>
          </table:table-cell>
          <table:table-cell table:style-name="ce12" table:formula="of:=IF([$Leituras_Contadores.F12]=&quot;&quot;; &quot;&quot;; [$Leituras_Contadores.F12]-[$Leituras_Contadores.E12])" office:value-type="float" office:value="22" calcext:value-type="float">
            <text:p>22</text:p>
          </table:table-cell>
          <table:table-cell table:style-name="ce12" table:formula="of:=IF([$Leituras_Contadores.G12]=&quot;&quot;; &quot;&quot;; [$Leituras_Contadores.G12]-[$Leituras_Contadores.F12])" office:value-type="float" office:value="86" calcext:value-type="float">
            <text:p>86</text:p>
          </table:table-cell>
          <table:table-cell table:style-name="ce12" table:formula="of:=IF([$Leituras_Contadores.H12]=&quot;&quot;; &quot;&quot;; [$Leituras_Contadores.H12]-[$Leituras_Contadores.G12])" office:value-type="float" office:value="86" calcext:value-type="float">
            <text:p>86</text:p>
          </table:table-cell>
          <table:table-cell table:style-name="ce12" table:formula="of:=IF([$Leituras_Contadores.I12]=&quot;&quot;; &quot;&quot;; [$Leituras_Contadores.I12]-[$Leituras_Contadores.H12])" office:value-type="float" office:value="285" calcext:value-type="float">
            <text:p>285</text:p>
          </table:table-cell>
          <table:table-cell table:style-name="ce12" table:formula="of:=IF([$Leituras_Contadores.J12]=&quot;&quot;; &quot;&quot;; [$Leituras_Contadores.J12]-[$Leituras_Contadores.I12])">
            <text:p/>
          </table:table-cell>
          <table:table-cell table:style-name="ce12" table:formula="of:=IF([$Leituras_Contadores.K12]=&quot;&quot;; &quot;&quot;; [$Leituras_Contadores.K12]-[$Leituras_Contadores.J12])">
            <text:p/>
          </table:table-cell>
          <table:table-cell table:style-name="ce12" table:formula="of:=IF([$Leituras_Contadores.L12]=&quot;&quot;; &quot;&quot;; [$Leituras_Contadores.L12]-[$Leituras_Contadores.K12])">
            <text:p/>
          </table:table-cell>
          <table:table-cell table:style-name="ce12" table:formula="of:=IF([$Leituras_Contadores.M12]=&quot;&quot;; &quot;&quot;; [$Leituras_Contadores.M12]-[$Leituras_Contadores.L12])">
            <text:p/>
          </table:table-cell>
          <table:table-cell table:style-name="ce12" table:formula="of:=IF([$Leituras_Contadores.N12]=&quot;&quot;; &quot;&quot;; [$Leituras_Contadores.N12]-[$Leituras_Contadores.M12])">
            <text:p/>
          </table:table-cell>
          <table:table-cell table:style-name="ce12" table:formula="of:=IF([$Leituras_Contadores.O12]=&quot;&quot;; &quot;&quot;; [$Leituras_Contadores.O12]-[$Leituras_Contadores.N12])">
            <text:p/>
          </table:table-cell>
          <table:table-cell table:style-name="ce12" table:formula="of:=IF([$Leituras_Contadores.P12]=&quot;&quot;; &quot;&quot;; [$Leituras_Contadores.P12]-[$Leituras_Contadores.O12])">
            <text:p/>
          </table:table-cell>
          <table:table-cell table:style-name="ce33" table:formula="of:=SUM([.D12:.O12])" office:value-type="float" office:value="576" calcext:value-type="float">
            <text:p>576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9" calcext:value-type="float">
            <text:p>9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1" table:formula="of:=IF([$Leituras_Contadores.E13]=&quot;&quot;; &quot;&quot;; [$Leituras_Contadores.E13]-[$Leituras_Contadores.D13])" office:value-type="float" office:value="108" calcext:value-type="float">
            <text:p>108</text:p>
          </table:table-cell>
          <table:table-cell table:style-name="ce11" table:formula="of:=IF([$Leituras_Contadores.F13]=&quot;&quot;; &quot;&quot;; [$Leituras_Contadores.F13]-[$Leituras_Contadores.E13])" office:value-type="float" office:value="812" calcext:value-type="float">
            <text:p>812</text:p>
          </table:table-cell>
          <table:table-cell table:style-name="ce11" table:formula="of:=IF([$Leituras_Contadores.G13]=&quot;&quot;; &quot;&quot;; [$Leituras_Contadores.G13]-[$Leituras_Contadores.F13])" office:value-type="float" office:value="452" calcext:value-type="float">
            <text:p>452</text:p>
          </table:table-cell>
          <table:table-cell table:style-name="ce12" table:formula="of:=IF([$Leituras_Contadores.H13]=&quot;&quot;; &quot;&quot;; [$Leituras_Contadores.H13]-[$Leituras_Contadores.G13])" office:value-type="float" office:value="648" calcext:value-type="float">
            <text:p>648</text:p>
          </table:table-cell>
          <table:table-cell table:style-name="ce11" table:formula="of:=IF([$Leituras_Contadores.I13]=&quot;&quot;; &quot;&quot;; [$Leituras_Contadores.I13]-[$Leituras_Contadores.H13])" office:value-type="float" office:value="1061" calcext:value-type="float">
            <text:p>1.061</text:p>
          </table:table-cell>
          <table:table-cell table:style-name="ce11" table:formula="of:=IF([$Leituras_Contadores.J13]=&quot;&quot;; &quot;&quot;; [$Leituras_Contadores.J13]-[$Leituras_Contadores.I13])">
            <text:p/>
          </table:table-cell>
          <table:table-cell table:style-name="ce11" table:formula="of:=IF([$Leituras_Contadores.K13]=&quot;&quot;; &quot;&quot;; [$Leituras_Contadores.K13]-[$Leituras_Contadores.J13])">
            <text:p/>
          </table:table-cell>
          <table:table-cell table:style-name="ce11" table:formula="of:=IF([$Leituras_Contadores.L13]=&quot;&quot;; &quot;&quot;; [$Leituras_Contadores.L13]-[$Leituras_Contadores.K13])">
            <text:p/>
          </table:table-cell>
          <table:table-cell table:style-name="ce11" table:formula="of:=IF([$Leituras_Contadores.M13]=&quot;&quot;; &quot;&quot;; [$Leituras_Contadores.M13]-[$Leituras_Contadores.L13])">
            <text:p/>
          </table:table-cell>
          <table:table-cell table:style-name="ce11" table:formula="of:=IF([$Leituras_Contadores.N13]=&quot;&quot;; &quot;&quot;; [$Leituras_Contadores.N13]-[$Leituras_Contadores.M13])">
            <text:p/>
          </table:table-cell>
          <table:table-cell table:style-name="ce11" table:formula="of:=IF([$Leituras_Contadores.O13]=&quot;&quot;; &quot;&quot;; [$Leituras_Contadores.O13]-[$Leituras_Contadores.N13])">
            <text:p/>
          </table:table-cell>
          <table:table-cell table:style-name="ce11" table:formula="of:=IF([$Leituras_Contadores.P13]=&quot;&quot;; &quot;&quot;; [$Leituras_Contadores.P13]-[$Leituras_Contadores.O13])">
            <text:p/>
          </table:table-cell>
          <table:table-cell table:style-name="ce32" table:formula="of:=SUM([.D13:.O13])" office:value-type="float" office:value="3081" calcext:value-type="float">
            <text:p>3.081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10" calcext:value-type="float">
            <text:p>10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IF([$Leituras_Contadores.E14]=&quot;&quot;; &quot;&quot;; [$Leituras_Contadores.E14]-[$Leituras_Contadores.D14])" office:value-type="float" office:value="0" calcext:value-type="float">
            <text:p>0</text:p>
          </table:table-cell>
          <table:table-cell table:style-name="ce12" table:formula="of:=IF([$Leituras_Contadores.F14]=&quot;&quot;; &quot;&quot;; [$Leituras_Contadores.F14]-[$Leituras_Contadores.E14])" office:value-type="float" office:value="0" calcext:value-type="float">
            <text:p>0</text:p>
          </table:table-cell>
          <table:table-cell table:style-name="ce12" table:formula="of:=IF([$Leituras_Contadores.G14]=&quot;&quot;; &quot;&quot;; [$Leituras_Contadores.G14]-[$Leituras_Contadores.F14])" office:value-type="float" office:value="5750" calcext:value-type="float">
            <text:p>5.750</text:p>
          </table:table-cell>
          <table:table-cell table:style-name="ce12" table:formula="of:=IF([$Leituras_Contadores.H14]=&quot;&quot;; &quot;&quot;; [$Leituras_Contadores.H14]-[$Leituras_Contadores.G14])" office:value-type="float" office:value="5075" calcext:value-type="float">
            <text:p>5.075</text:p>
          </table:table-cell>
          <table:table-cell table:style-name="ce12" table:formula="of:=IF([$Leituras_Contadores.I14]=&quot;&quot;; &quot;&quot;; [$Leituras_Contadores.I14]-[$Leituras_Contadores.H14])" office:value-type="float" office:value="7991" calcext:value-type="float">
            <text:p>7.991</text:p>
          </table:table-cell>
          <table:table-cell table:style-name="ce12" table:formula="of:=IF([$Leituras_Contadores.J14]=&quot;&quot;; &quot;&quot;; [$Leituras_Contadores.J14]-[$Leituras_Contadores.I14])">
            <text:p/>
          </table:table-cell>
          <table:table-cell table:style-name="ce12" table:formula="of:=IF([$Leituras_Contadores.K14]=&quot;&quot;; &quot;&quot;; [$Leituras_Contadores.K14]-[$Leituras_Contadores.J14])">
            <text:p/>
          </table:table-cell>
          <table:table-cell table:style-name="ce12" table:formula="of:=IF([$Leituras_Contadores.L14]=&quot;&quot;; &quot;&quot;; [$Leituras_Contadores.L14]-[$Leituras_Contadores.K14])">
            <text:p/>
          </table:table-cell>
          <table:table-cell table:style-name="ce12" table:formula="of:=IF([$Leituras_Contadores.M14]=&quot;&quot;; &quot;&quot;; [$Leituras_Contadores.M14]-[$Leituras_Contadores.L14])">
            <text:p/>
          </table:table-cell>
          <table:table-cell table:style-name="ce12" table:formula="of:=IF([$Leituras_Contadores.N14]=&quot;&quot;; &quot;&quot;; [$Leituras_Contadores.N14]-[$Leituras_Contadores.M14])">
            <text:p/>
          </table:table-cell>
          <table:table-cell table:style-name="ce12" table:formula="of:=IF([$Leituras_Contadores.O14]=&quot;&quot;; &quot;&quot;; [$Leituras_Contadores.O14]-[$Leituras_Contadores.N14])">
            <text:p/>
          </table:table-cell>
          <table:table-cell table:style-name="ce12" table:formula="of:=IF([$Leituras_Contadores.P14]=&quot;&quot;; &quot;&quot;; [$Leituras_Contadores.P14]-[$Leituras_Contadores.O14])">
            <text:p/>
          </table:table-cell>
          <table:table-cell table:style-name="ce33" table:formula="of:=SUM([.D14:.O14])" office:value-type="float" office:value="18816" calcext:value-type="float">
            <text:p>18.816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11" calcext:value-type="float">
            <text:p>11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IF([$Leituras_Contadores.E15]=&quot;&quot;; &quot;&quot;; [$Leituras_Contadores.E15]-[$Leituras_Contadores.D15])" office:value-type="float" office:value="0" calcext:value-type="float">
            <text:p>0</text:p>
          </table:table-cell>
          <table:table-cell table:style-name="ce12" table:formula="of:=IF([$Leituras_Contadores.F15]=&quot;&quot;; &quot;&quot;; [$Leituras_Contadores.F15]-[$Leituras_Contadores.E15])" office:value-type="float" office:value="0" calcext:value-type="float">
            <text:p>0</text:p>
          </table:table-cell>
          <table:table-cell table:style-name="ce12" table:formula="of:=IF([$Leituras_Contadores.G15]=&quot;&quot;; &quot;&quot;; [$Leituras_Contadores.G15]-[$Leituras_Contadores.F15])" office:value-type="float" office:value="0" calcext:value-type="float">
            <text:p>0</text:p>
          </table:table-cell>
          <table:table-cell table:style-name="ce12" table:formula="of:=IF([$Leituras_Contadores.H15]=&quot;&quot;; &quot;&quot;; [$Leituras_Contadores.H15]-[$Leituras_Contadores.G15])" office:value-type="float" office:value="0" calcext:value-type="float">
            <text:p>0</text:p>
          </table:table-cell>
          <table:table-cell table:style-name="ce12" table:formula="of:=IF([$Leituras_Contadores.I15]=&quot;&quot;; &quot;&quot;; [$Leituras_Contadores.I15]-[$Leituras_Contadores.H15])" office:value-type="float" office:value="463" calcext:value-type="float">
            <text:p>463</text:p>
          </table:table-cell>
          <table:table-cell table:style-name="ce11" table:formula="of:=IF([$Leituras_Contadores.J15]=&quot;&quot;; &quot;&quot;; [$Leituras_Contadores.J15]-[$Leituras_Contadores.I15])">
            <text:p/>
          </table:table-cell>
          <table:table-cell table:style-name="ce11" table:formula="of:=IF([$Leituras_Contadores.K15]=&quot;&quot;; &quot;&quot;; [$Leituras_Contadores.K15]-[$Leituras_Contadores.J15])">
            <text:p/>
          </table:table-cell>
          <table:table-cell table:style-name="ce11" table:formula="of:=IF([$Leituras_Contadores.L15]=&quot;&quot;; &quot;&quot;; [$Leituras_Contadores.L15]-[$Leituras_Contadores.K15])">
            <text:p/>
          </table:table-cell>
          <table:table-cell table:style-name="ce11" table:formula="of:=IF([$Leituras_Contadores.M15]=&quot;&quot;; &quot;&quot;; [$Leituras_Contadores.M15]-[$Leituras_Contadores.L15])">
            <text:p/>
          </table:table-cell>
          <table:table-cell table:style-name="ce11" table:formula="of:=IF([$Leituras_Contadores.N15]=&quot;&quot;; &quot;&quot;; [$Leituras_Contadores.N15]-[$Leituras_Contadores.M15])">
            <text:p/>
          </table:table-cell>
          <table:table-cell table:style-name="ce11" table:formula="of:=IF([$Leituras_Contadores.O15]=&quot;&quot;; &quot;&quot;; [$Leituras_Contadores.O15]-[$Leituras_Contadores.N15])">
            <text:p/>
          </table:table-cell>
          <table:table-cell table:style-name="ce11" table:formula="of:=IF([$Leituras_Contadores.P15]=&quot;&quot;; &quot;&quot;; [$Leituras_Contadores.P15]-[$Leituras_Contadores.O15])">
            <text:p/>
          </table:table-cell>
          <table:table-cell table:style-name="ce32" table:formula="of:=SUM([.D15:.O15])" office:value-type="float" office:value="463" calcext:value-type="float">
            <text:p>463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12" calcext:value-type="float">
            <text:p>12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2" table:formula="of:=IF([$Leituras_Contadores.E16]=&quot;&quot;; &quot;&quot;; [$Leituras_Contadores.E16]-[$Leituras_Contadores.D16])">
            <text:p/>
          </table:table-cell>
          <table:table-cell table:style-name="ce12" table:formula="of:=IF([$Leituras_Contadores.F16]=&quot;&quot;; &quot;&quot;; [$Leituras_Contadores.F16]-[$Leituras_Contadores.E16])">
            <text:p/>
          </table:table-cell>
          <table:table-cell table:style-name="ce12" table:formula="of:=IF([$Leituras_Contadores.G16]=&quot;&quot;; &quot;&quot;; [$Leituras_Contadores.G16]-[$Leituras_Contadores.F16])">
            <text:p/>
          </table:table-cell>
          <table:table-cell table:style-name="ce12" table:formula="of:=IF([$Leituras_Contadores.H16]=&quot;&quot;; &quot;&quot;; [$Leituras_Contadores.H16]-[$Leituras_Contadores.G16])">
            <text:p/>
          </table:table-cell>
          <table:table-cell table:style-name="ce12" table:formula="of:=IF([$Leituras_Contadores.I16]=&quot;&quot;; &quot;&quot;; [$Leituras_Contadores.I16]-[$Leituras_Contadores.H16])">
            <text:p/>
          </table:table-cell>
          <table:table-cell table:style-name="ce12" table:formula="of:=IF([$Leituras_Contadores.J16]=&quot;&quot;; &quot;&quot;; [$Leituras_Contadores.J16]-[$Leituras_Contadores.I16])">
            <text:p/>
          </table:table-cell>
          <table:table-cell table:style-name="ce12" table:formula="of:=IF([$Leituras_Contadores.K16]=&quot;&quot;; &quot;&quot;; [$Leituras_Contadores.K16]-[$Leituras_Contadores.J16])">
            <text:p/>
          </table:table-cell>
          <table:table-cell table:style-name="ce12" table:formula="of:=IF([$Leituras_Contadores.L16]=&quot;&quot;; &quot;&quot;; [$Leituras_Contadores.L16]-[$Leituras_Contadores.K16])">
            <text:p/>
          </table:table-cell>
          <table:table-cell table:style-name="ce12" table:formula="of:=IF([$Leituras_Contadores.M16]=&quot;&quot;; &quot;&quot;; [$Leituras_Contadores.M16]-[$Leituras_Contadores.L16])">
            <text:p/>
          </table:table-cell>
          <table:table-cell table:style-name="ce12" table:formula="of:=IF([$Leituras_Contadores.N16]=&quot;&quot;; &quot;&quot;; [$Leituras_Contadores.N16]-[$Leituras_Contadores.M16])">
            <text:p/>
          </table:table-cell>
          <table:table-cell table:style-name="ce12" table:formula="of:=IF([$Leituras_Contadores.O16]=&quot;&quot;; &quot;&quot;; [$Leituras_Contadores.O16]-[$Leituras_Contadores.N16])">
            <text:p/>
          </table:table-cell>
          <table:table-cell table:style-name="ce12" table:formula="of:=IF([$Leituras_Contadores.P16]=&quot;&quot;; &quot;&quot;; [$Leituras_Contadores.P16]-[$Leituras_Contadores.O16])">
            <text:p/>
          </table:table-cell>
          <table:table-cell table:style-name="ce33" table:formula="of:=SUM([.D16:.O16])" office:value-type="float" office:value="0" calcext:value-type="float">
            <text:p>0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13" calcext:value-type="float">
            <text:p>13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11" table:formula="of:=IF([$Leituras_Contadores.E17]=&quot;&quot;; &quot;&quot;; [$Leituras_Contadores.E17]-[$Leituras_Contadores.D17])">
            <text:p/>
          </table:table-cell>
          <table:table-cell table:style-name="ce12" table:formula="of:=IF([$Leituras_Contadores.F17]=&quot;&quot;; &quot;&quot;; [$Leituras_Contadores.F17]-[$Leituras_Contadores.E17])">
            <text:p/>
          </table:table-cell>
          <table:table-cell table:style-name="ce11" table:formula="of:=IF([$Leituras_Contadores.G17]=&quot;&quot;; &quot;&quot;; [$Leituras_Contadores.G17]-[$Leituras_Contadores.F17])">
            <text:p/>
          </table:table-cell>
          <table:table-cell table:style-name="ce12" table:formula="of:=IF([$Leituras_Contadores.H17]=&quot;&quot;; &quot;&quot;; [$Leituras_Contadores.H17]-[$Leituras_Contadores.G17])">
            <text:p/>
          </table:table-cell>
          <table:table-cell table:style-name="ce11" table:formula="of:=IF([$Leituras_Contadores.I17]=&quot;&quot;; &quot;&quot;; [$Leituras_Contadores.I17]-[$Leituras_Contadores.H17])">
            <text:p/>
          </table:table-cell>
          <table:table-cell table:style-name="ce11" table:formula="of:=IF([$Leituras_Contadores.J17]=&quot;&quot;; &quot;&quot;; [$Leituras_Contadores.J17]-[$Leituras_Contadores.I17])">
            <text:p/>
          </table:table-cell>
          <table:table-cell table:style-name="ce11" table:formula="of:=IF([$Leituras_Contadores.K17]=&quot;&quot;; &quot;&quot;; [$Leituras_Contadores.K17]-[$Leituras_Contadores.J17])">
            <text:p/>
          </table:table-cell>
          <table:table-cell table:style-name="ce11" table:formula="of:=IF([$Leituras_Contadores.L17]=&quot;&quot;; &quot;&quot;; [$Leituras_Contadores.L17]-[$Leituras_Contadores.K17])">
            <text:p/>
          </table:table-cell>
          <table:table-cell table:style-name="ce11" table:formula="of:=IF([$Leituras_Contadores.M17]=&quot;&quot;; &quot;&quot;; [$Leituras_Contadores.M17]-[$Leituras_Contadores.L17])">
            <text:p/>
          </table:table-cell>
          <table:table-cell table:style-name="ce11" table:formula="of:=IF([$Leituras_Contadores.N17]=&quot;&quot;; &quot;&quot;; [$Leituras_Contadores.N17]-[$Leituras_Contadores.M17])">
            <text:p/>
          </table:table-cell>
          <table:table-cell table:style-name="ce11" table:formula="of:=IF([$Leituras_Contadores.O17]=&quot;&quot;; &quot;&quot;; [$Leituras_Contadores.O17]-[$Leituras_Contadores.N17])">
            <text:p/>
          </table:table-cell>
          <table:table-cell table:style-name="ce11" table:formula="of:=IF([$Leituras_Contadores.P17]=&quot;&quot;; &quot;&quot;; [$Leituras_Contadores.P17]-[$Leituras_Contadores.O17])">
            <text:p/>
          </table:table-cell>
          <table:table-cell table:style-name="ce32" table:formula="of:=SUM([.D17:.O17])" office:value-type="float" office:value="0" calcext:value-type="float">
            <text:p>0</text:p>
          </table:table-cell>
          <table:table-cell table:number-columns-repeated="16368"/>
        </table:table-row>
        <table:table-row table:style-name="ro5">
          <table:table-cell/>
          <table:table-cell table:style-name="ce30"/>
          <table:table-cell table:style-name="ce8" office:value-type="string" calcext:value-type="string">
            <text:p>Total Geral</text:p>
          </table:table-cell>
          <table:table-cell table:style-name="ce13" table:formula="of:=SUM([.D5:.D17])" office:value-type="float" office:value="5774" calcext:value-type="float">
            <text:p>5.774</text:p>
          </table:table-cell>
          <table:table-cell table:style-name="ce13" table:formula="of:=SUM([.E5:.E17])" office:value-type="float" office:value="18506" calcext:value-type="float">
            <text:p>18.506</text:p>
          </table:table-cell>
          <table:table-cell table:style-name="ce13" table:formula="of:=SUM([.F5:.F17])" office:value-type="float" office:value="28388" calcext:value-type="float">
            <text:p>28.388</text:p>
          </table:table-cell>
          <table:table-cell table:style-name="ce13" table:formula="of:=SUM([.G5:.G17])" office:value-type="float" office:value="27502" calcext:value-type="float">
            <text:p>27.502</text:p>
          </table:table-cell>
          <table:table-cell table:style-name="ce13" table:formula="of:=SUM([.H5:.H17])" office:value-type="float" office:value="30250" calcext:value-type="float">
            <text:p>30.250</text:p>
          </table:table-cell>
          <table:table-cell table:style-name="ce13" table:formula="of:=SUM([.I5:.I17])" office:value-type="float" office:value="0" calcext:value-type="float">
            <text:p>0</text:p>
          </table:table-cell>
          <table:table-cell table:style-name="ce13" table:formula="of:=SUM([.J5:.J17])" office:value-type="float" office:value="0" calcext:value-type="float">
            <text:p>0</text:p>
          </table:table-cell>
          <table:table-cell table:style-name="ce13" table:formula="of:=SUM([.K5:.K17])" office:value-type="float" office:value="0" calcext:value-type="float">
            <text:p>0</text:p>
          </table:table-cell>
          <table:table-cell table:style-name="ce13" table:formula="of:=SUM([.L5:.L17])" office:value-type="float" office:value="0" calcext:value-type="float">
            <text:p>0</text:p>
          </table:table-cell>
          <table:table-cell table:style-name="ce13" table:formula="of:=SUM([.M5:.M17])" office:value-type="float" office:value="0" calcext:value-type="float">
            <text:p>0</text:p>
          </table:table-cell>
          <table:table-cell table:style-name="ce13" table:formula="of:=SUM([.N5:.N17])" office:value-type="float" office:value="0" calcext:value-type="float">
            <text:p>0</text:p>
          </table:table-cell>
          <table:table-cell table:style-name="ce13" table:formula="of:=SUM([.O5:.O17])" office:value-type="float" office:value="0" calcext:value-type="float">
            <text:p>0</text:p>
          </table:table-cell>
          <table:table-cell table:style-name="ce13" table:formula="of:=SUM([.P5:.P17])" office:value-type="float" office:value="110420" calcext:value-type="float">
            <text:p>110.420</text:p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6"/>
          <table:table-cell table:style-name="ce31" table:formula="of:=[.G18]-27502" office:value-type="float" office:value="0" calcext:value-type="float">
            <text:p>0</text:p>
          </table:table-cell>
          <table:table-cell table:number-columns-repeated="16377"/>
        </table:table-row>
        <table:table-row table:style-name="ro6" table:number-rows-repeated="978">
          <table:table-cell table:number-columns-repeated="16384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s_Mensais" table:style-name="ta5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0" table:default-cell-style-name="Default"/>
        <table:table-column table:style-name="co7" table:number-columns-repeated="16358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CUSTO FINANCEIRO POR MÊS (FÓRMULA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quipamento</text:p>
          </table:table-cell>
          <table:table-cell table:style-name="ce10" office:value-type="string" calcext:value-type="string">
            <text:p>Janeiro</text:p>
          </table:table-cell>
          <table:table-cell table:style-name="ce10" office:value-type="string" calcext:value-type="string">
            <text:p>Fevereiro</text:p>
          </table:table-cell>
          <table:table-cell table:style-name="ce10" office:value-type="string" calcext:value-type="string">
            <text:p>Março</text:p>
          </table:table-cell>
          <table:table-cell table:style-name="ce10" office:value-type="string" calcext:value-type="string">
            <text:p>Abril</text:p>
          </table:table-cell>
          <table:table-cell table:style-name="ce10" office:value-type="string" calcext:value-type="string">
            <text:p>Maio</text:p>
          </table:table-cell>
          <table:table-cell table:style-name="ce10" office:value-type="string" calcext:value-type="string">
            <text:p>Junho</text:p>
          </table:table-cell>
          <table:table-cell table:style-name="ce10" office:value-type="string" calcext:value-type="string">
            <text:p>Julho</text:p>
          </table:table-cell>
          <table:table-cell table:style-name="ce10" office:value-type="string" calcext:value-type="string">
            <text:p>Agosto</text:p>
          </table:table-cell>
          <table:table-cell table:style-name="ce10" office:value-type="string" calcext:value-type="string">
            <text:p>Setembro</text:p>
          </table:table-cell>
          <table:table-cell table:style-name="ce10" office:value-type="string" calcext:value-type="string">
            <text:p>Outubro</text:p>
          </table:table-cell>
          <table:table-cell table:style-name="ce10" office:value-type="string" calcext:value-type="string">
            <text:p>Novembro</text:p>
          </table:table-cell>
          <table:table-cell table:style-name="ce10" office:value-type="string" calcext:value-type="string">
            <text:p>Dezembro</text:p>
          </table:table-cell>
          <table:table-cell table:style-name="ce10" office:value-type="string" calcext:value-type="string">
            <text:p>Total Ano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OJA - LEX 711 / NºS.:74638D6601D8</text:p>
          </table:table-cell>
          <table:table-cell table:style-name="ce14" table:formula="of:=IF([$Volume_Impressao.D5]=&quot;&quot;;&quot;&quot;;IF([$Volume_Impressao.D5]=0;0;MAX([#REF!];[$Volume_Impressao.D5]*[#REF!])))" office:value-type="string" office:string-value="" calcext:value-type="error">
            <text:p>#REF!</text:p>
          </table:table-cell>
          <table:table-cell table:style-name="ce14" table:formula="of:=IF([$Volume_Impressao.E5]=&quot;&quot;;&quot;&quot;;IF([$Volume_Impressao.E5]=0;0;MAX([#REF!];[$Volume_Impressao.E5]*[#REF!])))" office:value-type="string" office:string-value="" calcext:value-type="error">
            <text:p>#REF!</text:p>
          </table:table-cell>
          <table:table-cell table:style-name="ce14" table:formula="of:=IF([$Volume_Impressao.F5]=&quot;&quot;;&quot;&quot;;IF([$Volume_Impressao.F5]=0;0;MAX([#REF!];[$Volume_Impressao.F5]*[#REF!])))" office:value-type="string" office:string-value="" calcext:value-type="error">
            <text:p>#REF!</text:p>
          </table:table-cell>
          <table:table-cell table:style-name="ce14" table:formula="of:=IF([$Volume_Impressao.G5]=&quot;&quot;;&quot;&quot;;IF([$Volume_Impressao.G5]=0;0;MAX([#REF!];[$Volume_Impressao.G5]*[#REF!])))" office:value-type="string" office:string-value="" calcext:value-type="error">
            <text:p>#REF!</text:p>
          </table:table-cell>
          <table:table-cell table:style-name="ce14" table:formula="of:=IF([$Volume_Impressao.H5]=&quot;&quot;;&quot;&quot;;IF([$Volume_Impressao.H5]=0;0;MAX([#REF!];[$Volume_Impressao.H5]*[#REF!])))" office:value-type="string" office:string-value="" calcext:value-type="error">
            <text:p>#REF!</text:p>
          </table:table-cell>
          <table:table-cell table:style-name="ce14" table:formula="of:=IF([$Volume_Impressao.I5]=&quot;&quot;;&quot;&quot;;IF([$Volume_Impressao.I5]=0;0;MAX([#REF!];[$Volume_Impressao.I5]*[#REF!])))">
            <text:p/>
          </table:table-cell>
          <table:table-cell table:style-name="ce14" table:formula="of:=IF([$Volume_Impressao.J5]=&quot;&quot;;&quot;&quot;;IF([$Volume_Impressao.J5]=0;0;MAX([#REF!];[$Volume_Impressao.J5]*[#REF!])))">
            <text:p/>
          </table:table-cell>
          <table:table-cell table:style-name="ce14" table:formula="of:=IF([$Volume_Impressao.K5]=&quot;&quot;;&quot;&quot;;IF([$Volume_Impressao.K5]=0;0;MAX([#REF!];[$Volume_Impressao.K5]*[#REF!])))">
            <text:p/>
          </table:table-cell>
          <table:table-cell table:style-name="ce14" table:formula="of:=IF([$Volume_Impressao.L5]=&quot;&quot;;&quot;&quot;;IF([$Volume_Impressao.L5]=0;0;MAX([#REF!];[$Volume_Impressao.L5]*[#REF!])))">
            <text:p/>
          </table:table-cell>
          <table:table-cell table:style-name="ce14" table:formula="of:=IF([$Volume_Impressao.M5]=&quot;&quot;;&quot;&quot;;IF([$Volume_Impressao.M5]=0;0;MAX([#REF!];[$Volume_Impressao.M5]*[#REF!])))">
            <text:p/>
          </table:table-cell>
          <table:table-cell table:style-name="ce14" table:formula="of:=IF([$Volume_Impressao.N5]=&quot;&quot;;&quot;&quot;;IF([$Volume_Impressao.N5]=0;0;MAX([#REF!];[$Volume_Impressao.N5]*[#REF!])))">
            <text:p/>
          </table:table-cell>
          <table:table-cell table:style-name="ce14" table:formula="of:=IF([$Volume_Impressao.O5]=&quot;&quot;;&quot;&quot;;IF([$Volume_Impressao.O5]=0;0;MAX([#REF!];[$Volume_Impressao.O5]*[#REF!])))">
            <text:p/>
          </table:table-cell>
          <table:table-cell table:style-name="ce34" table:formula="of:=SUM([.D5:.O5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LOJA - KM 3540 / NºS.: LSH5611146</text:p>
          </table:table-cell>
          <table:table-cell table:style-name="ce15" table:formula="of:=IF([$Volume_Impressao.D6]=&quot;&quot;;&quot;&quot;;IF([$Volume_Impressao.D6]=0;0;MAX([#REF!];[$Volume_Impressao.D6]*[#REF!])))" office:value-type="string" office:string-value="" calcext:value-type="error">
            <text:p>#REF!</text:p>
          </table:table-cell>
          <table:table-cell table:style-name="ce15" table:formula="of:=IF([$Volume_Impressao.E6]=&quot;&quot;;&quot;&quot;;IF([$Volume_Impressao.E6]=0;0;MAX([#REF!];[$Volume_Impressao.E6]*[#REF!])))" office:value-type="string" office:string-value="" calcext:value-type="error">
            <text:p>#REF!</text:p>
          </table:table-cell>
          <table:table-cell table:style-name="ce15" table:formula="of:=IF([$Volume_Impressao.F6]=&quot;&quot;;&quot;&quot;;IF([$Volume_Impressao.F6]=0;0;MAX([#REF!];[$Volume_Impressao.F6]*[#REF!])))" office:value-type="string" office:string-value="" calcext:value-type="error">
            <text:p>#REF!</text:p>
          </table:table-cell>
          <table:table-cell table:style-name="ce15" table:formula="of:=IF([$Volume_Impressao.G6]=&quot;&quot;;&quot;&quot;;IF([$Volume_Impressao.G6]=0;0;MAX([#REF!];[$Volume_Impressao.G6]*[#REF!])))" office:value-type="string" office:string-value="" calcext:value-type="error">
            <text:p>#REF!</text:p>
          </table:table-cell>
          <table:table-cell table:style-name="ce15" table:formula="of:=IF([$Volume_Impressao.H6]=&quot;&quot;;&quot;&quot;;IF([$Volume_Impressao.H6]=0;0;MAX([#REF!];[$Volume_Impressao.H6]*[#REF!])))" office:value-type="string" office:string-value="" calcext:value-type="error">
            <text:p>#REF!</text:p>
          </table:table-cell>
          <table:table-cell table:style-name="ce15" table:formula="of:=IF([$Volume_Impressao.I6]=&quot;&quot;;&quot;&quot;;IF([$Volume_Impressao.I6]=0;0;MAX([#REF!];[$Volume_Impressao.I6]*[#REF!])))">
            <text:p/>
          </table:table-cell>
          <table:table-cell table:style-name="ce15" table:formula="of:=IF([$Volume_Impressao.J6]=&quot;&quot;;&quot;&quot;;IF([$Volume_Impressao.J6]=0;0;MAX([#REF!];[$Volume_Impressao.J6]*[#REF!])))">
            <text:p/>
          </table:table-cell>
          <table:table-cell table:style-name="ce15" table:formula="of:=IF([$Volume_Impressao.K6]=&quot;&quot;;&quot;&quot;;IF([$Volume_Impressao.K6]=0;0;MAX([#REF!];[$Volume_Impressao.K6]*[#REF!])))">
            <text:p/>
          </table:table-cell>
          <table:table-cell table:style-name="ce15" table:formula="of:=IF([$Volume_Impressao.L6]=&quot;&quot;;&quot;&quot;;IF([$Volume_Impressao.L6]=0;0;MAX([#REF!];[$Volume_Impressao.L6]*[#REF!])))">
            <text:p/>
          </table:table-cell>
          <table:table-cell table:style-name="ce15" table:formula="of:=IF([$Volume_Impressao.M6]=&quot;&quot;;&quot;&quot;;IF([$Volume_Impressao.M6]=0;0;MAX([#REF!];[$Volume_Impressao.M6]*[#REF!])))">
            <text:p/>
          </table:table-cell>
          <table:table-cell table:style-name="ce15" table:formula="of:=IF([$Volume_Impressao.N6]=&quot;&quot;;&quot;&quot;;IF([$Volume_Impressao.N6]=0;0;MAX([#REF!];[$Volume_Impressao.N6]*[#REF!])))">
            <text:p/>
          </table:table-cell>
          <table:table-cell table:style-name="ce15" table:formula="of:=IF([$Volume_Impressao.O6]=&quot;&quot;;&quot;&quot;;IF([$Volume_Impressao.O6]=0;0;MAX([#REF!];[$Volume_Impressao.O6]*[#REF!])))">
            <text:p/>
          </table:table-cell>
          <table:table-cell table:style-name="ce35" table:formula="of:=SUM([.D6:.O6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OJA - CANON 5110 / Nº S.:AEMK07695</text:p>
          </table:table-cell>
          <table:table-cell table:style-name="ce14" table:formula="of:=IF([$Volume_Impressao.D7]=&quot;&quot;;&quot;&quot;;IF([$Volume_Impressao.D7]=0;0;MAX([#REF!];[$Volume_Impressao.D7]*[#REF!])))" office:value-type="string" office:string-value="" calcext:value-type="error">
            <text:p>#REF!</text:p>
          </table:table-cell>
          <table:table-cell table:style-name="ce14" table:formula="of:=IF([$Volume_Impressao.E7]=&quot;&quot;;&quot;&quot;;IF([$Volume_Impressao.E7]=0;0;MAX([#REF!];[$Volume_Impressao.E7]*[#REF!])))" office:value-type="string" office:string-value="" calcext:value-type="error">
            <text:p>#REF!</text:p>
          </table:table-cell>
          <table:table-cell table:style-name="ce14" table:formula="of:=IF([$Volume_Impressao.F7]=&quot;&quot;;&quot;&quot;;IF([$Volume_Impressao.F7]=0;0;MAX([#REF!];[$Volume_Impressao.F7]*[#REF!])))">
            <text:p/>
          </table:table-cell>
          <table:table-cell table:style-name="ce14" table:formula="of:=IF([$Volume_Impressao.G7]=&quot;&quot;;&quot;&quot;;IF([$Volume_Impressao.G7]=0;0;MAX([#REF!];[$Volume_Impressao.G7]*[#REF!])))">
            <text:p/>
          </table:table-cell>
          <table:table-cell table:style-name="ce14" table:formula="of:=IF([$Volume_Impressao.H7]=&quot;&quot;;&quot;&quot;;IF([$Volume_Impressao.H7]=0;0;MAX([#REF!];[$Volume_Impressao.H7]*[#REF!])))">
            <text:p/>
          </table:table-cell>
          <table:table-cell table:style-name="ce14" table:formula="of:=IF([$Volume_Impressao.I7]=&quot;&quot;;&quot;&quot;;IF([$Volume_Impressao.I7]=0;0;MAX([#REF!];[$Volume_Impressao.I7]*[#REF!])))">
            <text:p/>
          </table:table-cell>
          <table:table-cell table:style-name="ce14" table:formula="of:=IF([$Volume_Impressao.J7]=&quot;&quot;;&quot;&quot;;IF([$Volume_Impressao.J7]=0;0;MAX([#REF!];[$Volume_Impressao.J7]*[#REF!])))">
            <text:p/>
          </table:table-cell>
          <table:table-cell table:style-name="ce14" table:formula="of:=IF([$Volume_Impressao.K7]=&quot;&quot;;&quot;&quot;;IF([$Volume_Impressao.K7]=0;0;MAX([#REF!];[$Volume_Impressao.K7]*[#REF!])))">
            <text:p/>
          </table:table-cell>
          <table:table-cell table:style-name="ce14" table:formula="of:=IF([$Volume_Impressao.L7]=&quot;&quot;;&quot;&quot;;IF([$Volume_Impressao.L7]=0;0;MAX([#REF!];[$Volume_Impressao.L7]*[#REF!])))">
            <text:p/>
          </table:table-cell>
          <table:table-cell table:style-name="ce14" table:formula="of:=IF([$Volume_Impressao.M7]=&quot;&quot;;&quot;&quot;;IF([$Volume_Impressao.M7]=0;0;MAX([#REF!];[$Volume_Impressao.M7]*[#REF!])))">
            <text:p/>
          </table:table-cell>
          <table:table-cell table:style-name="ce14" table:formula="of:=IF([$Volume_Impressao.N7]=&quot;&quot;;&quot;&quot;;IF([$Volume_Impressao.N7]=0;0;MAX([#REF!];[$Volume_Impressao.N7]*[#REF!])))">
            <text:p/>
          </table:table-cell>
          <table:table-cell table:style-name="ce14" table:formula="of:=IF([$Volume_Impressao.O7]=&quot;&quot;;&quot;&quot;;IF([$Volume_Impressao.O7]=0;0;MAX([#REF!];[$Volume_Impressao.O7]*[#REF!])))">
            <text:p/>
          </table:table-cell>
          <table:table-cell table:style-name="ce34" table:formula="of:=SUM([.D7:.O7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LOJA - BROTHER 830 / NºS.: U67681G5H364140</text:p>
          </table:table-cell>
          <table:table-cell table:style-name="ce15" table:formula="of:=IF([$Volume_Impressao.D8]=&quot;&quot;;&quot;&quot;;IF([$Volume_Impressao.D8]=0;0;MAX([#REF!];[$Volume_Impressao.D8]*[#REF!])))" office:value-type="string" office:string-value="" calcext:value-type="error">
            <text:p>#REF!</text:p>
          </table:table-cell>
          <table:table-cell table:style-name="ce15" table:formula="of:=IF([$Volume_Impressao.E8]=&quot;&quot;;&quot;&quot;;IF([$Volume_Impressao.E8]=0;0;MAX([#REF!];[$Volume_Impressao.E8]*[#REF!])))" office:value-type="string" office:string-value="" calcext:value-type="error">
            <text:p>#REF!</text:p>
          </table:table-cell>
          <table:table-cell table:style-name="ce15" table:formula="of:=IF([$Volume_Impressao.F8]=&quot;&quot;;&quot;&quot;;IF([$Volume_Impressao.F8]=0;0;MAX([#REF!];[$Volume_Impressao.F8]*[#REF!])))" office:value-type="string" office:string-value="" calcext:value-type="error">
            <text:p>#REF!</text:p>
          </table:table-cell>
          <table:table-cell table:style-name="ce15" table:formula="of:=IF([$Volume_Impressao.G8]=&quot;&quot;;&quot;&quot;;IF([$Volume_Impressao.G8]=0;0;MAX([#REF!];[$Volume_Impressao.G8]*[#REF!])))" office:value-type="string" office:string-value="" calcext:value-type="error">
            <text:p>#REF!</text:p>
          </table:table-cell>
          <table:table-cell table:style-name="ce15" table:formula="of:=IF([$Volume_Impressao.H8]=&quot;&quot;;&quot;&quot;;IF([$Volume_Impressao.H8]=0;0;MAX([#REF!];[$Volume_Impressao.H8]*[#REF!])))" office:value-type="string" office:string-value="" calcext:value-type="error">
            <text:p>#REF!</text:p>
          </table:table-cell>
          <table:table-cell table:style-name="ce15" table:formula="of:=IF([$Volume_Impressao.I8]=&quot;&quot;;&quot;&quot;;IF([$Volume_Impressao.I8]=0;0;MAX([#REF!];[$Volume_Impressao.I8]*[#REF!])))">
            <text:p/>
          </table:table-cell>
          <table:table-cell table:style-name="ce15" table:formula="of:=IF([$Volume_Impressao.J8]=&quot;&quot;;&quot;&quot;;IF([$Volume_Impressao.J8]=0;0;MAX([#REF!];[$Volume_Impressao.J8]*[#REF!])))">
            <text:p/>
          </table:table-cell>
          <table:table-cell table:style-name="ce15" table:formula="of:=IF([$Volume_Impressao.K8]=&quot;&quot;;&quot;&quot;;IF([$Volume_Impressao.K8]=0;0;MAX([#REF!];[$Volume_Impressao.K8]*[#REF!])))">
            <text:p/>
          </table:table-cell>
          <table:table-cell table:style-name="ce15" table:formula="of:=IF([$Volume_Impressao.L8]=&quot;&quot;;&quot;&quot;;IF([$Volume_Impressao.L8]=0;0;MAX([#REF!];[$Volume_Impressao.L8]*[#REF!])))">
            <text:p/>
          </table:table-cell>
          <table:table-cell table:style-name="ce15" table:formula="of:=IF([$Volume_Impressao.M8]=&quot;&quot;;&quot;&quot;;IF([$Volume_Impressao.M8]=0;0;MAX([#REF!];[$Volume_Impressao.M8]*[#REF!])))">
            <text:p/>
          </table:table-cell>
          <table:table-cell table:style-name="ce15" table:formula="of:=IF([$Volume_Impressao.N8]=&quot;&quot;;&quot;&quot;;IF([$Volume_Impressao.N8]=0;0;MAX([#REF!];[$Volume_Impressao.N8]*[#REF!])))">
            <text:p/>
          </table:table-cell>
          <table:table-cell table:style-name="ce15" table:formula="of:=IF([$Volume_Impressao.O8]=&quot;&quot;;&quot;&quot;;IF([$Volume_Impressao.O8]=0;0;MAX([#REF!];[$Volume_Impressao.O8]*[#REF!])))">
            <text:p/>
          </table:table-cell>
          <table:table-cell table:style-name="ce35" table:formula="of:=SUM([.D8:.O8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CRETARIA - CANON 7010 / Nº S.:KMLJ33178</text:p>
          </table:table-cell>
          <table:table-cell table:style-name="ce14" table:formula="of:=IF([$Volume_Impressao.D9]=&quot;&quot;;&quot;&quot;;IF([$Volume_Impressao.D9]=0;0;MAX([#REF!];[$Volume_Impressao.D9]*[#REF!])))" office:value-type="string" office:string-value="" calcext:value-type="error">
            <text:p>#REF!</text:p>
          </table:table-cell>
          <table:table-cell table:style-name="ce14" table:formula="of:=IF([$Volume_Impressao.E9]=&quot;&quot;;&quot;&quot;;IF([$Volume_Impressao.E9]=0;0;MAX([#REF!];[$Volume_Impressao.E9]*[#REF!])))" office:value-type="string" office:string-value="" calcext:value-type="error">
            <text:p>#REF!</text:p>
          </table:table-cell>
          <table:table-cell table:style-name="ce14" table:formula="of:=IF([$Volume_Impressao.F9]=&quot;&quot;;&quot;&quot;;IF([$Volume_Impressao.F9]=0;0;MAX([#REF!];[$Volume_Impressao.F9]*[#REF!])))" office:value-type="string" office:string-value="" calcext:value-type="error">
            <text:p>#REF!</text:p>
          </table:table-cell>
          <table:table-cell table:style-name="ce14" table:formula="of:=IF([$Volume_Impressao.G9]=&quot;&quot;;&quot;&quot;;IF([$Volume_Impressao.G9]=0;0;MAX([#REF!];[$Volume_Impressao.G9]*[#REF!])))" office:value-type="string" office:string-value="" calcext:value-type="error">
            <text:p>#REF!</text:p>
          </table:table-cell>
          <table:table-cell table:style-name="ce14" table:formula="of:=IF([$Volume_Impressao.H9]=&quot;&quot;;&quot;&quot;;IF([$Volume_Impressao.H9]=0;0;MAX([#REF!];[$Volume_Impressao.H9]*[#REF!])))" office:value-type="string" office:string-value="" calcext:value-type="error">
            <text:p>#REF!</text:p>
          </table:table-cell>
          <table:table-cell table:style-name="ce14" table:formula="of:=IF([$Volume_Impressao.I9]=&quot;&quot;;&quot;&quot;;IF([$Volume_Impressao.I9]=0;0;MAX([#REF!];[$Volume_Impressao.I9]*[#REF!])))">
            <text:p/>
          </table:table-cell>
          <table:table-cell table:style-name="ce14" table:formula="of:=IF([$Volume_Impressao.J9]=&quot;&quot;;&quot;&quot;;IF([$Volume_Impressao.J9]=0;0;MAX([#REF!];[$Volume_Impressao.J9]*[#REF!])))">
            <text:p/>
          </table:table-cell>
          <table:table-cell table:style-name="ce14" table:formula="of:=IF([$Volume_Impressao.K9]=&quot;&quot;;&quot;&quot;;IF([$Volume_Impressao.K9]=0;0;MAX([#REF!];[$Volume_Impressao.K9]*[#REF!])))">
            <text:p/>
          </table:table-cell>
          <table:table-cell table:style-name="ce14" table:formula="of:=IF([$Volume_Impressao.L9]=&quot;&quot;;&quot;&quot;;IF([$Volume_Impressao.L9]=0;0;MAX([#REF!];[$Volume_Impressao.L9]*[#REF!])))">
            <text:p/>
          </table:table-cell>
          <table:table-cell table:style-name="ce14" table:formula="of:=IF([$Volume_Impressao.M9]=&quot;&quot;;&quot;&quot;;IF([$Volume_Impressao.M9]=0;0;MAX([#REF!];[$Volume_Impressao.M9]*[#REF!])))">
            <text:p/>
          </table:table-cell>
          <table:table-cell table:style-name="ce14" table:formula="of:=IF([$Volume_Impressao.N9]=&quot;&quot;;&quot;&quot;;IF([$Volume_Impressao.N9]=0;0;MAX([#REF!];[$Volume_Impressao.N9]*[#REF!])))">
            <text:p/>
          </table:table-cell>
          <table:table-cell table:style-name="ce14" table:formula="of:=IF([$Volume_Impressao.O9]=&quot;&quot;;&quot;&quot;;IF([$Volume_Impressao.O9]=0;0;MAX([#REF!];[$Volume_Impressao.O9]*[#REF!])))">
            <text:p/>
          </table:table-cell>
          <table:table-cell table:style-name="ce34" table:formula="of:=SUM([.D9:.O9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EDUC.INFANTIL - CANON 7010 / N°S.:KMLJ11703</text:p>
          </table:table-cell>
          <table:table-cell table:style-name="ce15" table:formula="of:=IF([$Volume_Impressao.D10]=&quot;&quot;;&quot;&quot;;IF([$Volume_Impressao.D10]=0;0;MAX([#REF!];[$Volume_Impressao.D10]*[#REF!])))" office:value-type="string" office:string-value="" calcext:value-type="error">
            <text:p>#REF!</text:p>
          </table:table-cell>
          <table:table-cell table:style-name="ce15" table:formula="of:=IF([$Volume_Impressao.E10]=&quot;&quot;;&quot;&quot;;IF([$Volume_Impressao.E10]=0;0;MAX([#REF!];[$Volume_Impressao.E10]*[#REF!])))" office:value-type="string" office:string-value="" calcext:value-type="error">
            <text:p>#REF!</text:p>
          </table:table-cell>
          <table:table-cell table:style-name="ce15" table:formula="of:=IF([$Volume_Impressao.F10]=&quot;&quot;;&quot;&quot;;IF([$Volume_Impressao.F10]=0;0;MAX([#REF!];[$Volume_Impressao.F10]*[#REF!])))" office:value-type="string" office:string-value="" calcext:value-type="error">
            <text:p>#REF!</text:p>
          </table:table-cell>
          <table:table-cell table:style-name="ce15" table:formula="of:=IF([$Volume_Impressao.G10]=&quot;&quot;;&quot;&quot;;IF([$Volume_Impressao.G10]=0;0;MAX([#REF!];[$Volume_Impressao.G10]*[#REF!])))" office:value-type="string" office:string-value="" calcext:value-type="error">
            <text:p>#REF!</text:p>
          </table:table-cell>
          <table:table-cell table:style-name="ce15" table:formula="of:=IF([$Volume_Impressao.H10]=&quot;&quot;;&quot;&quot;;IF([$Volume_Impressao.H10]=0;0;MAX([#REF!];[$Volume_Impressao.H10]*[#REF!])))" office:value-type="string" office:string-value="" calcext:value-type="error">
            <text:p>#REF!</text:p>
          </table:table-cell>
          <table:table-cell table:style-name="ce15" table:formula="of:=IF([$Volume_Impressao.I10]=&quot;&quot;;&quot;&quot;;IF([$Volume_Impressao.I10]=0;0;MAX([#REF!];[$Volume_Impressao.I10]*[#REF!])))">
            <text:p/>
          </table:table-cell>
          <table:table-cell table:style-name="ce15" table:formula="of:=IF([$Volume_Impressao.J10]=&quot;&quot;;&quot;&quot;;IF([$Volume_Impressao.J10]=0;0;MAX([#REF!];[$Volume_Impressao.J10]*[#REF!])))">
            <text:p/>
          </table:table-cell>
          <table:table-cell table:style-name="ce15" table:formula="of:=IF([$Volume_Impressao.K10]=&quot;&quot;;&quot;&quot;;IF([$Volume_Impressao.K10]=0;0;MAX([#REF!];[$Volume_Impressao.K10]*[#REF!])))">
            <text:p/>
          </table:table-cell>
          <table:table-cell table:style-name="ce15" table:formula="of:=IF([$Volume_Impressao.L10]=&quot;&quot;;&quot;&quot;;IF([$Volume_Impressao.L10]=0;0;MAX([#REF!];[$Volume_Impressao.L10]*[#REF!])))">
            <text:p/>
          </table:table-cell>
          <table:table-cell table:style-name="ce15" table:formula="of:=IF([$Volume_Impressao.M10]=&quot;&quot;;&quot;&quot;;IF([$Volume_Impressao.M10]=0;0;MAX([#REF!];[$Volume_Impressao.M10]*[#REF!])))">
            <text:p/>
          </table:table-cell>
          <table:table-cell table:style-name="ce15" table:formula="of:=IF([$Volume_Impressao.N10]=&quot;&quot;;&quot;&quot;;IF([$Volume_Impressao.N10]=0;0;MAX([#REF!];[$Volume_Impressao.N10]*[#REF!])))">
            <text:p/>
          </table:table-cell>
          <table:table-cell table:style-name="ce15" table:formula="of:=IF([$Volume_Impressao.O10]=&quot;&quot;;&quot;&quot;;IF([$Volume_Impressao.O10]=0;0;MAX([#REF!];[$Volume_Impressao.O10]*[#REF!])))">
            <text:p/>
          </table:table-cell>
          <table:table-cell table:style-name="ce35" table:formula="of:=SUM([.D10:.O10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ORD. ENS.MEDIO - CANON G4100 / N°S.:KKVG59057</text:p>
          </table:table-cell>
          <table:table-cell table:style-name="ce14" table:formula="of:=IF([$Volume_Impressao.D11]=&quot;&quot;;&quot;&quot;;IF([$Volume_Impressao.D11]=0;0;MAX([#REF!];[$Volume_Impressao.D11]*[#REF!])))" office:value-type="string" office:string-value="" calcext:value-type="error">
            <text:p>#REF!</text:p>
          </table:table-cell>
          <table:table-cell table:style-name="ce14" table:formula="of:=IF([$Volume_Impressao.E11]=&quot;&quot;;&quot;&quot;;IF([$Volume_Impressao.E11]=0;0;MAX([#REF!];[$Volume_Impressao.E11]*[#REF!])))" office:value-type="string" office:string-value="" calcext:value-type="error">
            <text:p>#REF!</text:p>
          </table:table-cell>
          <table:table-cell table:style-name="ce14" table:formula="of:=IF([$Volume_Impressao.F11]=&quot;&quot;;&quot;&quot;;IF([$Volume_Impressao.F11]=0;0;MAX([#REF!];[$Volume_Impressao.F11]*[#REF!])))" office:value-type="string" office:string-value="" calcext:value-type="error">
            <text:p>#REF!</text:p>
          </table:table-cell>
          <table:table-cell table:style-name="ce14" table:formula="of:=IF([$Volume_Impressao.G11]=&quot;&quot;;&quot;&quot;;IF([$Volume_Impressao.G11]=0;0;MAX([#REF!];[$Volume_Impressao.G11]*[#REF!])))" office:value-type="string" office:string-value="" calcext:value-type="error">
            <text:p>#REF!</text:p>
          </table:table-cell>
          <table:table-cell table:style-name="ce14" table:formula="of:=IF([$Volume_Impressao.H11]=&quot;&quot;;&quot;&quot;;IF([$Volume_Impressao.H11]=0;0;MAX([#REF!];[$Volume_Impressao.H11]*[#REF!])))">
            <text:p/>
          </table:table-cell>
          <table:table-cell table:style-name="ce14" table:formula="of:=IF([$Volume_Impressao.I11]=&quot;&quot;;&quot;&quot;;IF([$Volume_Impressao.I11]=0;0;MAX([#REF!];[$Volume_Impressao.I11]*[#REF!])))">
            <text:p/>
          </table:table-cell>
          <table:table-cell table:style-name="ce14" table:formula="of:=IF([$Volume_Impressao.J11]=&quot;&quot;;&quot;&quot;;IF([$Volume_Impressao.J11]=0;0;MAX([#REF!];[$Volume_Impressao.J11]*[#REF!])))">
            <text:p/>
          </table:table-cell>
          <table:table-cell table:style-name="ce14" table:formula="of:=IF([$Volume_Impressao.K11]=&quot;&quot;;&quot;&quot;;IF([$Volume_Impressao.K11]=0;0;MAX([#REF!];[$Volume_Impressao.K11]*[#REF!])))">
            <text:p/>
          </table:table-cell>
          <table:table-cell table:style-name="ce14" table:formula="of:=IF([$Volume_Impressao.L11]=&quot;&quot;;&quot;&quot;;IF([$Volume_Impressao.L11]=0;0;MAX([#REF!];[$Volume_Impressao.L11]*[#REF!])))">
            <text:p/>
          </table:table-cell>
          <table:table-cell table:style-name="ce14" table:formula="of:=IF([$Volume_Impressao.M11]=&quot;&quot;;&quot;&quot;;IF([$Volume_Impressao.M11]=0;0;MAX([#REF!];[$Volume_Impressao.M11]*[#REF!])))">
            <text:p/>
          </table:table-cell>
          <table:table-cell table:style-name="ce14" table:formula="of:=IF([$Volume_Impressao.N11]=&quot;&quot;;&quot;&quot;;IF([$Volume_Impressao.N11]=0;0;MAX([#REF!];[$Volume_Impressao.N11]*[#REF!])))">
            <text:p/>
          </table:table-cell>
          <table:table-cell table:style-name="ce14" table:formula="of:=IF([$Volume_Impressao.O11]=&quot;&quot;;&quot;&quot;;IF([$Volume_Impressao.O11]=0;0;MAX([#REF!];[$Volume_Impressao.O11]*[#REF!])))">
            <text:p/>
          </table:table-cell>
          <table:table-cell table:style-name="ce34" table:formula="of:=SUM([.D11:.O11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CONTABILIDADE - CANON G7010 / N°S.:KMLJ36560</text:p>
          </table:table-cell>
          <table:table-cell table:style-name="ce15" table:formula="of:=IF([$Volume_Impressao.D12]=&quot;&quot;;&quot;&quot;;IF([$Volume_Impressao.D12]=0;0;MAX([#REF!];[$Volume_Impressao.D12]*[#REF!])))" office:value-type="string" office:string-value="" calcext:value-type="error">
            <text:p>#REF!</text:p>
          </table:table-cell>
          <table:table-cell table:style-name="ce15" table:formula="of:=IF([$Volume_Impressao.E12]=&quot;&quot;;&quot;&quot;;IF([$Volume_Impressao.E12]=0;0;MAX([#REF!];[$Volume_Impressao.E12]*[#REF!])))" office:value-type="string" office:string-value="" calcext:value-type="error">
            <text:p>#REF!</text:p>
          </table:table-cell>
          <table:table-cell table:style-name="ce15" table:formula="of:=IF([$Volume_Impressao.F12]=&quot;&quot;;&quot;&quot;;IF([$Volume_Impressao.F12]=0;0;MAX([#REF!];[$Volume_Impressao.F12]*[#REF!])))" office:value-type="string" office:string-value="" calcext:value-type="error">
            <text:p>#REF!</text:p>
          </table:table-cell>
          <table:table-cell table:style-name="ce15" table:formula="of:=IF([$Volume_Impressao.G12]=&quot;&quot;;&quot;&quot;;IF([$Volume_Impressao.G12]=0;0;MAX([#REF!];[$Volume_Impressao.G12]*[#REF!])))" office:value-type="string" office:string-value="" calcext:value-type="error">
            <text:p>#REF!</text:p>
          </table:table-cell>
          <table:table-cell table:style-name="ce15" table:formula="of:=IF([$Volume_Impressao.H12]=&quot;&quot;;&quot;&quot;;IF([$Volume_Impressao.H12]=0;0;MAX([#REF!];[$Volume_Impressao.H12]*[#REF!])))" office:value-type="string" office:string-value="" calcext:value-type="error">
            <text:p>#REF!</text:p>
          </table:table-cell>
          <table:table-cell table:style-name="ce15" table:formula="of:=IF([$Volume_Impressao.I12]=&quot;&quot;;&quot;&quot;;IF([$Volume_Impressao.I12]=0;0;MAX([#REF!];[$Volume_Impressao.I12]*[#REF!])))">
            <text:p/>
          </table:table-cell>
          <table:table-cell table:style-name="ce15" table:formula="of:=IF([$Volume_Impressao.J12]=&quot;&quot;;&quot;&quot;;IF([$Volume_Impressao.J12]=0;0;MAX([#REF!];[$Volume_Impressao.J12]*[#REF!])))">
            <text:p/>
          </table:table-cell>
          <table:table-cell table:style-name="ce15" table:formula="of:=IF([$Volume_Impressao.K12]=&quot;&quot;;&quot;&quot;;IF([$Volume_Impressao.K12]=0;0;MAX([#REF!];[$Volume_Impressao.K12]*[#REF!])))">
            <text:p/>
          </table:table-cell>
          <table:table-cell table:style-name="ce15" table:formula="of:=IF([$Volume_Impressao.L12]=&quot;&quot;;&quot;&quot;;IF([$Volume_Impressao.L12]=0;0;MAX([#REF!];[$Volume_Impressao.L12]*[#REF!])))">
            <text:p/>
          </table:table-cell>
          <table:table-cell table:style-name="ce15" table:formula="of:=IF([$Volume_Impressao.M12]=&quot;&quot;;&quot;&quot;;IF([$Volume_Impressao.M12]=0;0;MAX([#REF!];[$Volume_Impressao.M12]*[#REF!])))">
            <text:p/>
          </table:table-cell>
          <table:table-cell table:style-name="ce15" table:formula="of:=IF([$Volume_Impressao.N12]=&quot;&quot;;&quot;&quot;;IF([$Volume_Impressao.N12]=0;0;MAX([#REF!];[$Volume_Impressao.N12]*[#REF!])))">
            <text:p/>
          </table:table-cell>
          <table:table-cell table:style-name="ce15" table:formula="of:=IF([$Volume_Impressao.O12]=&quot;&quot;;&quot;&quot;;IF([$Volume_Impressao.O12]=0;0;MAX([#REF!];[$Volume_Impressao.O12]*[#REF!])))">
            <text:p/>
          </table:table-cell>
          <table:table-cell table:style-name="ce35" table:formula="of:=SUM([.D12:.O12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ECRETARIA - R 3510-IMPR. / N°S.:T316Q110165</text:p>
          </table:table-cell>
          <table:table-cell table:style-name="ce14" table:formula="of:=IF([$Volume_Impressao.D13]=&quot;&quot;;&quot;&quot;;IF([$Volume_Impressao.D13]=0;0;MAX([#REF!];[$Volume_Impressao.D13]*[#REF!])))" office:value-type="string" office:string-value="" calcext:value-type="error">
            <text:p>#REF!</text:p>
          </table:table-cell>
          <table:table-cell table:style-name="ce14" table:formula="of:=IF([$Volume_Impressao.E13]=&quot;&quot;;&quot;&quot;;IF([$Volume_Impressao.E13]=0;0;MAX([#REF!];[$Volume_Impressao.E13]*[#REF!])))" office:value-type="string" office:string-value="" calcext:value-type="error">
            <text:p>#REF!</text:p>
          </table:table-cell>
          <table:table-cell table:style-name="ce14" table:formula="of:=IF([$Volume_Impressao.F13]=&quot;&quot;;&quot;&quot;;IF([$Volume_Impressao.F13]=0;0;MAX([#REF!];[$Volume_Impressao.F13]*[#REF!])))" office:value-type="string" office:string-value="" calcext:value-type="error">
            <text:p>#REF!</text:p>
          </table:table-cell>
          <table:table-cell table:style-name="ce14" table:formula="of:=IF([$Volume_Impressao.G13]=&quot;&quot;;&quot;&quot;;IF([$Volume_Impressao.G13]=0;0;MAX([#REF!];[$Volume_Impressao.G13]*[#REF!])))" office:value-type="string" office:string-value="" calcext:value-type="error">
            <text:p>#REF!</text:p>
          </table:table-cell>
          <table:table-cell table:style-name="ce14" table:formula="of:=IF([$Volume_Impressao.H13]=&quot;&quot;;&quot;&quot;;IF([$Volume_Impressao.H13]=0;0;MAX([#REF!];[$Volume_Impressao.H13]*[#REF!])))" office:value-type="string" office:string-value="" calcext:value-type="error">
            <text:p>#REF!</text:p>
          </table:table-cell>
          <table:table-cell table:style-name="ce14" table:formula="of:=IF([$Volume_Impressao.I13]=&quot;&quot;;&quot;&quot;;IF([$Volume_Impressao.I13]=0;0;MAX([#REF!];[$Volume_Impressao.I13]*[#REF!])))">
            <text:p/>
          </table:table-cell>
          <table:table-cell table:style-name="ce14" table:formula="of:=IF([$Volume_Impressao.J13]=&quot;&quot;;&quot;&quot;;IF([$Volume_Impressao.J13]=0;0;MAX([#REF!];[$Volume_Impressao.J13]*[#REF!])))">
            <text:p/>
          </table:table-cell>
          <table:table-cell table:style-name="ce14" table:formula="of:=IF([$Volume_Impressao.K13]=&quot;&quot;;&quot;&quot;;IF([$Volume_Impressao.K13]=0;0;MAX([#REF!];[$Volume_Impressao.K13]*[#REF!])))">
            <text:p/>
          </table:table-cell>
          <table:table-cell table:style-name="ce14" table:formula="of:=IF([$Volume_Impressao.L13]=&quot;&quot;;&quot;&quot;;IF([$Volume_Impressao.L13]=0;0;MAX([#REF!];[$Volume_Impressao.L13]*[#REF!])))">
            <text:p/>
          </table:table-cell>
          <table:table-cell table:style-name="ce14" table:formula="of:=IF([$Volume_Impressao.M13]=&quot;&quot;;&quot;&quot;;IF([$Volume_Impressao.M13]=0;0;MAX([#REF!];[$Volume_Impressao.M13]*[#REF!])))">
            <text:p/>
          </table:table-cell>
          <table:table-cell table:style-name="ce14" table:formula="of:=IF([$Volume_Impressao.N13]=&quot;&quot;;&quot;&quot;;IF([$Volume_Impressao.N13]=0;0;MAX([#REF!];[$Volume_Impressao.N13]*[#REF!])))">
            <text:p/>
          </table:table-cell>
          <table:table-cell table:style-name="ce14" table:formula="of:=IF([$Volume_Impressao.O13]=&quot;&quot;;&quot;&quot;;IF([$Volume_Impressao.O13]=0;0;MAX([#REF!];[$Volume_Impressao.O13]*[#REF!])))">
            <text:p/>
          </table:table-cell>
          <table:table-cell table:style-name="ce34" table:formula="of:=SUM([.D13:.O13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COORDENAÇÃO - CANON G7010 / N°S.:KMLJ31609</text:p>
          </table:table-cell>
          <table:table-cell table:style-name="ce15" table:formula="of:=IF([$Volume_Impressao.D14]=&quot;&quot;;&quot;&quot;;IF([$Volume_Impressao.D14]=0;0;MAX([#REF!];[$Volume_Impressao.D14]*[#REF!])))" office:value-type="float" office:value="0" calcext:value-type="float">
            <text:p>R$ 0,00</text:p>
          </table:table-cell>
          <table:table-cell table:style-name="ce15" table:formula="of:=IF([$Volume_Impressao.E14]=&quot;&quot;;&quot;&quot;;IF([$Volume_Impressao.E14]=0;0;MAX([#REF!];[$Volume_Impressao.E14]*[#REF!])))" office:value-type="float" office:value="0" calcext:value-type="float">
            <text:p>R$ 0,00</text:p>
          </table:table-cell>
          <table:table-cell table:style-name="ce15" table:formula="of:=IF([$Volume_Impressao.F14]=&quot;&quot;;&quot;&quot;;IF([$Volume_Impressao.F14]=0;0;MAX([#REF!];[$Volume_Impressao.F14]*[#REF!])))" office:value-type="string" office:string-value="" calcext:value-type="error">
            <text:p>#REF!</text:p>
          </table:table-cell>
          <table:table-cell table:style-name="ce15" table:formula="of:=IF([$Volume_Impressao.G14]=&quot;&quot;;&quot;&quot;;IF([$Volume_Impressao.G14]=0;0;MAX([#REF!];[$Volume_Impressao.G14]*[#REF!])))" office:value-type="string" office:string-value="" calcext:value-type="error">
            <text:p>#REF!</text:p>
          </table:table-cell>
          <table:table-cell table:style-name="ce15" table:formula="of:=IF([$Volume_Impressao.H14]=&quot;&quot;;&quot;&quot;;IF([$Volume_Impressao.H14]=0;0;MAX([#REF!];[$Volume_Impressao.H14]*[#REF!])))" office:value-type="string" office:string-value="" calcext:value-type="error">
            <text:p>#REF!</text:p>
          </table:table-cell>
          <table:table-cell table:style-name="ce15" table:formula="of:=IF([$Volume_Impressao.I14]=&quot;&quot;;&quot;&quot;;IF([$Volume_Impressao.I14]=0;0;MAX([#REF!];[$Volume_Impressao.I14]*[#REF!])))">
            <text:p/>
          </table:table-cell>
          <table:table-cell table:style-name="ce15" table:formula="of:=IF([$Volume_Impressao.J14]=&quot;&quot;;&quot;&quot;;IF([$Volume_Impressao.J14]=0;0;MAX([#REF!];[$Volume_Impressao.J14]*[#REF!])))">
            <text:p/>
          </table:table-cell>
          <table:table-cell table:style-name="ce15" table:formula="of:=IF([$Volume_Impressao.K14]=&quot;&quot;;&quot;&quot;;IF([$Volume_Impressao.K14]=0;0;MAX([#REF!];[$Volume_Impressao.K14]*[#REF!])))">
            <text:p/>
          </table:table-cell>
          <table:table-cell table:style-name="ce15" table:formula="of:=IF([$Volume_Impressao.L14]=&quot;&quot;;&quot;&quot;;IF([$Volume_Impressao.L14]=0;0;MAX([#REF!];[$Volume_Impressao.L14]*[#REF!])))">
            <text:p/>
          </table:table-cell>
          <table:table-cell table:style-name="ce15" table:formula="of:=IF([$Volume_Impressao.M14]=&quot;&quot;;&quot;&quot;;IF([$Volume_Impressao.M14]=0;0;MAX([#REF!];[$Volume_Impressao.M14]*[#REF!])))">
            <text:p/>
          </table:table-cell>
          <table:table-cell table:style-name="ce15" table:formula="of:=IF([$Volume_Impressao.N14]=&quot;&quot;;&quot;&quot;;IF([$Volume_Impressao.N14]=0;0;MAX([#REF!];[$Volume_Impressao.N14]*[#REF!])))">
            <text:p/>
          </table:table-cell>
          <table:table-cell table:style-name="ce15" table:formula="of:=IF([$Volume_Impressao.O14]=&quot;&quot;;&quot;&quot;;IF([$Volume_Impressao.O14]=0;0;MAX([#REF!];[$Volume_Impressao.O14]*[#REF!])))">
            <text:p/>
          </table:table-cell>
          <table:table-cell table:style-name="ce35" table:formula="of:=SUM([.D14:.O14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DIREÇÃO PEDAGOGIA - CANON 7010 / N°S.:KMLJ36564</text:p>
          </table:table-cell>
          <table:table-cell table:style-name="ce14" table:formula="of:=IF([$Volume_Impressao.D15]=&quot;&quot;;&quot;&quot;;IF([$Volume_Impressao.D15]=0;0;MAX([#REF!];[$Volume_Impressao.D15]*[#REF!])))" office:value-type="float" office:value="0" calcext:value-type="float">
            <text:p>R$ 0,00</text:p>
          </table:table-cell>
          <table:table-cell table:style-name="ce14" table:formula="of:=IF([$Volume_Impressao.E15]=&quot;&quot;;&quot;&quot;;IF([$Volume_Impressao.E15]=0;0;MAX([#REF!];[$Volume_Impressao.E15]*[#REF!])))" office:value-type="float" office:value="0" calcext:value-type="float">
            <text:p>R$ 0,00</text:p>
          </table:table-cell>
          <table:table-cell table:style-name="ce14" table:formula="of:=IF([$Volume_Impressao.F15]=&quot;&quot;;&quot;&quot;;IF([$Volume_Impressao.F15]=0;0;MAX([#REF!];[$Volume_Impressao.F15]*[#REF!])))" office:value-type="float" office:value="0" calcext:value-type="float">
            <text:p>R$ 0,00</text:p>
          </table:table-cell>
          <table:table-cell table:style-name="ce14" table:formula="of:=IF([$Volume_Impressao.G15]=&quot;&quot;;&quot;&quot;;IF([$Volume_Impressao.G15]=0;0;MAX([#REF!];[$Volume_Impressao.G15]*[#REF!])))" office:value-type="float" office:value="0" calcext:value-type="float">
            <text:p>R$ 0,00</text:p>
          </table:table-cell>
          <table:table-cell table:style-name="ce14" table:formula="of:=IF([$Volume_Impressao.H15]=&quot;&quot;;&quot;&quot;;IF([$Volume_Impressao.H15]=0;0;MAX([#REF!];[$Volume_Impressao.H15]*[#REF!])))" office:value-type="string" office:string-value="" calcext:value-type="error">
            <text:p>#REF!</text:p>
          </table:table-cell>
          <table:table-cell table:style-name="ce14" table:formula="of:=IF([$Volume_Impressao.I15]=&quot;&quot;;&quot;&quot;;IF([$Volume_Impressao.I15]=0;0;MAX([#REF!];[$Volume_Impressao.I15]*[#REF!])))">
            <text:p/>
          </table:table-cell>
          <table:table-cell table:style-name="ce14" table:formula="of:=IF([$Volume_Impressao.J15]=&quot;&quot;;&quot;&quot;;IF([$Volume_Impressao.J15]=0;0;MAX([#REF!];[$Volume_Impressao.J15]*[#REF!])))">
            <text:p/>
          </table:table-cell>
          <table:table-cell table:style-name="ce14" table:formula="of:=IF([$Volume_Impressao.K15]=&quot;&quot;;&quot;&quot;;IF([$Volume_Impressao.K15]=0;0;MAX([#REF!];[$Volume_Impressao.K15]*[#REF!])))">
            <text:p/>
          </table:table-cell>
          <table:table-cell table:style-name="ce14" table:formula="of:=IF([$Volume_Impressao.L15]=&quot;&quot;;&quot;&quot;;IF([$Volume_Impressao.L15]=0;0;MAX([#REF!];[$Volume_Impressao.L15]*[#REF!])))">
            <text:p/>
          </table:table-cell>
          <table:table-cell table:style-name="ce14" table:formula="of:=IF([$Volume_Impressao.M15]=&quot;&quot;;&quot;&quot;;IF([$Volume_Impressao.M15]=0;0;MAX([#REF!];[$Volume_Impressao.M15]*[#REF!])))">
            <text:p/>
          </table:table-cell>
          <table:table-cell table:style-name="ce14" table:formula="of:=IF([$Volume_Impressao.N15]=&quot;&quot;;&quot;&quot;;IF([$Volume_Impressao.N15]=0;0;MAX([#REF!];[$Volume_Impressao.N15]*[#REF!])))">
            <text:p/>
          </table:table-cell>
          <table:table-cell table:style-name="ce14" table:formula="of:=IF([$Volume_Impressao.O15]=&quot;&quot;;&quot;&quot;;IF([$Volume_Impressao.O15]=0;0;MAX([#REF!];[$Volume_Impressao.O15]*[#REF!])))">
            <text:p/>
          </table:table-cell>
          <table:table-cell table:style-name="ce34" table:formula="of:=SUM([.D15:.O15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5">
          <table:table-cell/>
          <table:table-cell table:style-name="ce53" office:value-type="float" office:value="12" calcext:value-type="float">
            <text:p>12</text:p>
          </table:table-cell>
          <table:table-cell table:style-name="ce53" office:value-type="string" calcext:value-type="string">
            <text:p>CONTABILIDADE - CANON 7010 / N°S.:KMNB21380</text:p>
          </table:table-cell>
          <table:table-cell table:style-name="ce15" table:formula="of:=IF([$Volume_Impressao.D16]=&quot;&quot;;&quot;&quot;;IF([$Volume_Impressao.D16]=0;0;MAX([#REF!];[$Volume_Impressao.D16]*[#REF!])))">
            <text:p/>
          </table:table-cell>
          <table:table-cell table:style-name="ce15" table:formula="of:=IF([$Volume_Impressao.E16]=&quot;&quot;;&quot;&quot;;IF([$Volume_Impressao.E16]=0;0;MAX([#REF!];[$Volume_Impressao.E16]*[#REF!])))">
            <text:p/>
          </table:table-cell>
          <table:table-cell table:style-name="ce15" table:formula="of:=IF([$Volume_Impressao.F16]=&quot;&quot;;&quot;&quot;;IF([$Volume_Impressao.F16]=0;0;MAX([#REF!];[$Volume_Impressao.F16]*[#REF!])))">
            <text:p/>
          </table:table-cell>
          <table:table-cell table:style-name="ce15" table:formula="of:=IF([$Volume_Impressao.G16]=&quot;&quot;;&quot;&quot;;IF([$Volume_Impressao.G16]=0;0;MAX([#REF!];[$Volume_Impressao.G16]*[#REF!])))">
            <text:p/>
          </table:table-cell>
          <table:table-cell table:style-name="ce15" table:formula="of:=IF([$Volume_Impressao.H16]=&quot;&quot;;&quot;&quot;;IF([$Volume_Impressao.H16]=0;0;MAX([#REF!];[$Volume_Impressao.H16]*[#REF!])))">
            <text:p/>
          </table:table-cell>
          <table:table-cell table:style-name="ce15" table:formula="of:=IF([$Volume_Impressao.I16]=&quot;&quot;;&quot;&quot;;IF([$Volume_Impressao.I16]=0;0;MAX([#REF!];[$Volume_Impressao.I16]*[#REF!])))">
            <text:p/>
          </table:table-cell>
          <table:table-cell table:style-name="ce15" table:formula="of:=IF([$Volume_Impressao.J16]=&quot;&quot;;&quot;&quot;;IF([$Volume_Impressao.J16]=0;0;MAX([#REF!];[$Volume_Impressao.J16]*[#REF!])))">
            <text:p/>
          </table:table-cell>
          <table:table-cell table:style-name="ce15" table:formula="of:=IF([$Volume_Impressao.K16]=&quot;&quot;;&quot;&quot;;IF([$Volume_Impressao.K16]=0;0;MAX([#REF!];[$Volume_Impressao.K16]*[#REF!])))">
            <text:p/>
          </table:table-cell>
          <table:table-cell table:style-name="ce15" table:formula="of:=IF([$Volume_Impressao.L16]=&quot;&quot;;&quot;&quot;;IF([$Volume_Impressao.L16]=0;0;MAX([#REF!];[$Volume_Impressao.L16]*[#REF!])))">
            <text:p/>
          </table:table-cell>
          <table:table-cell table:style-name="ce15" table:formula="of:=IF([$Volume_Impressao.M16]=&quot;&quot;;&quot;&quot;;IF([$Volume_Impressao.M16]=0;0;MAX([#REF!];[$Volume_Impressao.M16]*[#REF!])))">
            <text:p/>
          </table:table-cell>
          <table:table-cell table:style-name="ce15" table:formula="of:=IF([$Volume_Impressao.N16]=&quot;&quot;;&quot;&quot;;IF([$Volume_Impressao.N16]=0;0;MAX([#REF!];[$Volume_Impressao.N16]*[#REF!])))">
            <text:p/>
          </table:table-cell>
          <table:table-cell table:style-name="ce15" table:formula="of:=IF([$Volume_Impressao.O16]=&quot;&quot;;&quot;&quot;;IF([$Volume_Impressao.O16]=0;0;MAX([#REF!];[$Volume_Impressao.O16]*[#REF!])))">
            <text:p/>
          </table:table-cell>
          <table:table-cell table:style-name="ce35" table:formula="of:=SUM([.D16:.O16])" office:value-type="float" office:value="0" calcext:value-type="float">
            <text:p>R$ 0,00</text:p>
          </table:table-cell>
          <table:table-cell table:number-columns-repeated="16368"/>
        </table:table-row>
        <table:table-row table:style-name="ro5">
          <table:table-cell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DIR; RODRIGO - CANON 7010 / N°S.:KMLJ29121</text:p>
          </table:table-cell>
          <table:table-cell table:style-name="ce14" table:formula="of:=IF([$Volume_Impressao.D17]=&quot;&quot;;&quot;&quot;;IF([$Volume_Impressao.D17]=0;0;MAX([#REF!];[$Volume_Impressao.D17]*[#REF!])))">
            <text:p/>
          </table:table-cell>
          <table:table-cell table:style-name="ce14" table:formula="of:=IF([$Volume_Impressao.E17]=&quot;&quot;;&quot;&quot;;IF([$Volume_Impressao.E17]=0;0;MAX([#REF!];[$Volume_Impressao.E17]*[#REF!])))">
            <text:p/>
          </table:table-cell>
          <table:table-cell table:style-name="ce14" table:formula="of:=IF([$Volume_Impressao.F17]=&quot;&quot;;&quot;&quot;;IF([$Volume_Impressao.F17]=0;0;MAX([#REF!];[$Volume_Impressao.F17]*[#REF!])))">
            <text:p/>
          </table:table-cell>
          <table:table-cell table:style-name="ce14" table:formula="of:=IF([$Volume_Impressao.G17]=&quot;&quot;;&quot;&quot;;IF([$Volume_Impressao.G17]=0;0;MAX([#REF!];[$Volume_Impressao.G17]*[#REF!])))">
            <text:p/>
          </table:table-cell>
          <table:table-cell table:style-name="ce14" table:formula="of:=IF([$Volume_Impressao.H17]=&quot;&quot;;&quot;&quot;;IF([$Volume_Impressao.H17]=0;0;MAX([#REF!];[$Volume_Impressao.H17]*[#REF!])))">
            <text:p/>
          </table:table-cell>
          <table:table-cell table:style-name="ce14" table:formula="of:=IF([$Volume_Impressao.I17]=&quot;&quot;;&quot;&quot;;IF([$Volume_Impressao.I17]=0;0;MAX([#REF!];[$Volume_Impressao.I17]*[#REF!])))">
            <text:p/>
          </table:table-cell>
          <table:table-cell table:style-name="ce14" table:formula="of:=IF([$Volume_Impressao.J17]=&quot;&quot;;&quot;&quot;;IF([$Volume_Impressao.J17]=0;0;MAX([#REF!];[$Volume_Impressao.J17]*[#REF!])))">
            <text:p/>
          </table:table-cell>
          <table:table-cell table:style-name="ce14" table:formula="of:=IF([$Volume_Impressao.K17]=&quot;&quot;;&quot;&quot;;IF([$Volume_Impressao.K17]=0;0;MAX([#REF!];[$Volume_Impressao.K17]*[#REF!])))">
            <text:p/>
          </table:table-cell>
          <table:table-cell table:style-name="ce14" table:formula="of:=IF([$Volume_Impressao.L17]=&quot;&quot;;&quot;&quot;;IF([$Volume_Impressao.L17]=0;0;MAX([#REF!];[$Volume_Impressao.L17]*[#REF!])))">
            <text:p/>
          </table:table-cell>
          <table:table-cell table:style-name="ce14" table:formula="of:=IF([$Volume_Impressao.M17]=&quot;&quot;;&quot;&quot;;IF([$Volume_Impressao.M17]=0;0;MAX([#REF!];[$Volume_Impressao.M17]*[#REF!])))">
            <text:p/>
          </table:table-cell>
          <table:table-cell table:style-name="ce14" table:formula="of:=IF([$Volume_Impressao.N17]=&quot;&quot;;&quot;&quot;;IF([$Volume_Impressao.N17]=0;0;MAX([#REF!];[$Volume_Impressao.N17]*[#REF!])))">
            <text:p/>
          </table:table-cell>
          <table:table-cell table:style-name="ce14" table:formula="of:=IF([$Volume_Impressao.O17]=&quot;&quot;;&quot;&quot;;IF([$Volume_Impressao.O17]=0;0;MAX([#REF!];[$Volume_Impressao.O17]*[#REF!])))">
            <text:p/>
          </table:table-cell>
          <table:table-cell table:style-name="ce34" table:formula="of:=SUM([.D17:.O17])" office:value-type="float" office:value="0" calcext:value-type="float">
            <text:p>R$ 0,00</text:p>
          </table:table-cell>
          <table:table-cell table:number-columns-repeated="16368"/>
        </table:table-row>
        <table:table-row table:style-name="ro5">
          <table:table-cell/>
          <table:table-cell table:style-name="ce30"/>
          <table:table-cell table:style-name="ce8" office:value-type="string" calcext:value-type="string">
            <text:p>Total Geral</text:p>
          </table:table-cell>
          <table:table-cell table:style-name="ce16" table:formula="of:=SUM([.D5:.D17])" office:value-type="string" office:string-value="" calcext:value-type="error">
            <text:p>#REF!</text:p>
          </table:table-cell>
          <table:table-cell table:style-name="ce16" table:formula="of:=SUM([.E5:.E17])" office:value-type="string" office:string-value="" calcext:value-type="error">
            <text:p>#REF!</text:p>
          </table:table-cell>
          <table:table-cell table:style-name="ce16" table:formula="of:=SUM([.F5:.F17])" office:value-type="string" office:string-value="" calcext:value-type="error">
            <text:p>#REF!</text:p>
          </table:table-cell>
          <table:table-cell table:style-name="ce16" table:formula="of:=SUM([.G5:.G17])" office:value-type="string" office:string-value="" calcext:value-type="error">
            <text:p>#REF!</text:p>
          </table:table-cell>
          <table:table-cell table:style-name="ce16" table:formula="of:=SUM([.H5:.H17])" office:value-type="string" office:string-value="" calcext:value-type="error">
            <text:p>#REF!</text:p>
          </table:table-cell>
          <table:table-cell table:style-name="ce16" table:formula="of:=SUM([.I5:.I17])" office:value-type="float" office:value="0" calcext:value-type="float">
            <text:p>R$ 0,00</text:p>
          </table:table-cell>
          <table:table-cell table:style-name="ce16" table:formula="of:=SUM([.J5:.J17])" office:value-type="float" office:value="0" calcext:value-type="float">
            <text:p>R$ 0,00</text:p>
          </table:table-cell>
          <table:table-cell table:style-name="ce16" table:formula="of:=SUM([.K5:.K17])" office:value-type="float" office:value="0" calcext:value-type="float">
            <text:p>R$ 0,00</text:p>
          </table:table-cell>
          <table:table-cell table:style-name="ce16" table:formula="of:=SUM([.L5:.L17])" office:value-type="float" office:value="0" calcext:value-type="float">
            <text:p>R$ 0,00</text:p>
          </table:table-cell>
          <table:table-cell table:style-name="ce16" table:formula="of:=SUM([.M5:.M17])" office:value-type="float" office:value="0" calcext:value-type="float">
            <text:p>R$ 0,00</text:p>
          </table:table-cell>
          <table:table-cell table:style-name="ce16" table:formula="of:=SUM([.N5:.N17])" office:value-type="float" office:value="0" calcext:value-type="float">
            <text:p>R$ 0,00</text:p>
          </table:table-cell>
          <table:table-cell table:style-name="ce16" table:formula="of:=SUM([.O5:.O17])" office:value-type="float" office:value="0" calcext:value-type="float">
            <text:p>R$ 0,00</text:p>
          </table:table-cell>
          <table:table-cell table:style-name="ce16" table:formula="of:=SUM([.P5:.P17])" office:value-type="string" office:string-value="" calcext:value-type="error">
            <text:p>#REF!</text:p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6" table:number-rows-repeated="980">
          <table:table-cell table:number-columns-repeated="16384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figurar_snmp" table:style-name="ta6">
        <office:forms form:automatic-focus="false" form:apply-design-mode="false"/>
        <table:table-column table:style-name="co14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Usar SNMP para descoberta de OIDs e coleta de tados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/>
          <table:table-cell office:value-type="string" calcext:value-type="string">
            <text:p>Validação</text:p>
          </table:table-cell>
        </table:table-row>
        <table:table-row table:style-name="ro5">
          <table:table-cell/>
          <table:table-cell table:style-name="ce72" office:value-type="string" calcext:value-type="string">
            <text:p>snmpget -v2c -c public 192.168.1.100 1.3.6.1.2.1.43.10.2.1.4.1.1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ar OIDs</text:p>
          </table:table-cell>
        </table:table-row>
        <table:table-row table:style-name="ro5">
          <table:table-cell/>
          <table:table-cell table:style-name="ce72" office:value-type="string" calcext:value-type="string">
            <text:p>snmpwalk -v2c -c public 192.168.1.100 &gt; saida_completa.txt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/>
          <table:table-cell office:value-type="string" calcext:value-type="string">
            <text:p>Agendar tarefas de cole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0">00/00/0000</text:date>, <text:time style:data-style-name="N2" text:time-value="10:57:23.5390661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mo_5f_Executivo" style:display-name="PageStyle_Resumo_Executi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dastro_5f_Impressoras" style:display-name="PageStyle_Cadastro_Impressor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ituras_5f_Contadores" style:display-name="PageStyle_Leituras_Contad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lume_5f_Impressao" style:display-name="PageStyle_Volume_Impressa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s_5f_Mensais" style:display-name="PageStyle_Custos_Mensa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30T11:09:44.551972039</dc:date>
    <meta:editing-duration>PT12M29S</meta:editing-duration>
    <meta:editing-cycles>3</meta:editing-cycles>
    <meta:generator>LibreOffice/25.2.3.2$Linux_X86_64 LibreOffice_project/520$Build-2</meta:generator>
    <meta:document-statistic meta:table-count="6" meta:cell-count="7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53">
      <number:text>R$ </number:text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4pt" style:font-family-asian="Calibri" style:font-size-asian="14pt" style:font-family-complex="Calibri" style:font-size-complex="14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153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757575" style:text-position="0% 100%" fo:font-family="Arial" style:font-family-asian="Calibri" style:font-family-complex="Calibri"/>
    </style:style>
    <style:style style:name="T2" style:family="text">
      <style:text-properties fo:color="#000000" style:text-position="0% 100%" fo:font-family="Arial" style:font-family-asian="Calibri" style:font-family-complex="Calibri"/>
    </style:style>
  </office:automatic-styles>
  <office:body>
    <office:chart>
      <chart:chart svg:width="24.104cm" svg:height="24.977cm" xlink:href=".." xlink:type="simple" chart:class="chart:bar" chart:style-name="ch1">
        <chart:title svg:x="8.119cm" svg:y="0.635cm" chart:style-name="ch2">
          <text:p><text:span text:style-name="T1">Custo Acumulado por Impressora (R$)</text:span></text:p>
        </chart:title>
        <chart:plot-area chart:style-name="ch3" svg:x="1.712cm" svg:y="1.913cm" svg:width="21.91cm" svg:height="21.365cm">
          <chart:coordinate-region svg:x="3.238cm" svg:y="1.913cm" svg:width="20.273cm" svg:height="20.868cm"/>
          <chart:axis chart:dimension="x" chart:name="primary-x" chart:style-name="ch4" chartooo:axis-type="text">
            <chart:title svg:x="0.451cm" svg:y="12.966cm" chart:style-name="ch5">
              <text:p><text:span text:style-name="T2">R$</text:span></text:p>
            </chart:title>
            <chart:categories table:cell-range-address="Resumo_Executivo.B9:Resumo_Executivo.B21"/>
          </chart:axis>
          <chart:axis chart:dimension="y" chart:name="primary-y" chart:style-name="ch6">
            <chart:title svg:x="11.258cm" svg:y="23.778cm" chart:style-name="ch2">
              <text:p><text:span text:style-name="T2">Equipamento</text:span></text:p>
            </chart:title>
            <chart:grid chart:style-name="ch7" chart:class="major"/>
          </chart:axis>
          <chart:series chart:style-name="ch8" chart:values-cell-range-address="Resumo_Executivo.D9:Resumo_Executivo.D21" loext:label-string="&quot;Custo Total (R$)&quot;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 Total (R$)</text:p>
              </table:table-cell>
            </table:table-row>
          </table:table-header-rows>
          <table:table-rows>
            <table:table-row>
              <table:table-cell office:value-type="string">
                <text:p>#REF!</text:p>
                <draw:g>
                  <svg:desc>Resumo_Executivo.B9:Resumo_Executivo.B21</svg:desc>
                </draw:g>
              </table:table-cell>
              <table:table-cell office:value-type="float" office:value="NaN">
                <text:p>NaN</text:p>
                <draw:g>
                  <svg:desc>Resumo_Executivo.D9:Resumo_Executivo.D21</svg:desc>
                </draw:g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